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A4000000E4EC3C3C7B558DB5BA.png" manifest:media-type="image/png"/>
  <manifest:file-entry manifest:full-path="Pictures/10000201000000B200000085F2AB381D7CB2F9F9.png" manifest:media-type="image/png"/>
  <manifest:file-entry manifest:full-path="Pictures/10000000000001D60000007680E630E32646C332.png" manifest:media-type="image/png"/>
  <manifest:file-entry manifest:full-path="Pictures/100002010000008E0000008E685607D7C99FB96C.png" manifest:media-type="image/png"/>
  <manifest:file-entry manifest:full-path="Pictures/10000000000001590000020AE437DC39B73DBEC9.png" manifest:media-type="image/png"/>
  <manifest:file-entry manifest:full-path="Pictures/1000020100000091000000917802A5CA29FC894F.png" manifest:media-type="image/png"/>
  <manifest:file-entry manifest:full-path="Pictures/100002010000032E00000204F3D0C714D6C2F1D1.png" manifest:media-type="image/png"/>
  <manifest:file-entry manifest:full-path="Pictures/10000201000000E1000000A993CAB4EF4CB56262.png" manifest:media-type="image/png"/>
  <manifest:file-entry manifest:full-path="Pictures/10000201000000AC00000080D6B7C948FD8F73DB.png" manifest:media-type="image/png"/>
  <manifest:file-entry manifest:full-path="Pictures/10000201000000A4000000A400D111B5D115159D.png" manifest:media-type="image/png"/>
  <manifest:file-entry manifest:full-path="Pictures/1000000000000300000001D4F98357F31F74E668.jpg" manifest:media-type="image/jpeg"/>
  <manifest:file-entry manifest:full-path="Pictures/10000000000001A9000000693F2F2CA1716073F6.png" manifest:media-type="image/png"/>
  <manifest:file-entry manifest:full-path="Pictures/10000201000002A40000010E522596DB969251EF.png" manifest:media-type="image/png"/>
  <manifest:file-entry manifest:full-path="Pictures/10000201000003E4000001F4738B8962E53B1E55.png" manifest:media-type="image/png"/>
  <manifest:file-entry manifest:full-path="Pictures/1000020100000296000000C9FC61BEFA15D5635C.png" manifest:media-type="image/png"/>
  <manifest:file-entry manifest:full-path="Pictures/100000000000015800000103905A2C8B52289CCF.jpg" manifest:media-type="image/jpeg"/>
  <manifest:file-entry manifest:full-path="Pictures/1000000000000160000001099D7289C65DBB2E22.jpg" manifest:media-type="image/jpeg"/>
  <manifest:file-entry manifest:full-path="Pictures/100000000000028C0000018787D0489D738D33D5.png" manifest:media-type="image/png"/>
  <manifest:file-entry manifest:full-path="Pictures/100000000000029B000001F4159F791386750ACA.png" manifest:media-type="image/png"/>
  <manifest:file-entry manifest:full-path="Pictures/10000201000002420000018EB09C6551B9949C09.png" manifest:media-type="image/png"/>
  <manifest:file-entry manifest:full-path="Pictures/1000020100000264000000DA6F562DCC2105EA3E.png" manifest:media-type="image/png"/>
  <manifest:file-entry manifest:full-path="Pictures/1000020100000243000000C6C5EF26C5CD828530.png" manifest:media-type="image/png"/>
  <manifest:file-entry manifest:full-path="Pictures/100002010000037B0000029FD05DD9B26C5F00AD.png" manifest:media-type="image/png"/>
  <manifest:file-entry manifest:full-path="Pictures/10000000000000F100000187F3C5141635149F0C.png" manifest:media-type="image/png"/>
  <manifest:file-entry manifest:full-path="Pictures/100000000000011D0000017FDEC26BA722C23EE8.png" manifest:media-type="image/png"/>
  <manifest:file-entry manifest:full-path="Pictures/10000000000000CE0000019EAC33E164E27050BB.png" manifest:media-type="image/png"/>
  <manifest:file-entry manifest:full-path="Pictures/100000000000020A0000007FB4B3E8039BBDB4FE.png" manifest:media-type="image/png"/>
  <manifest:file-entry manifest:full-path="Pictures/10000000000004840000009A0FE0C6043A24F18B.png" manifest:media-type="image/png"/>
  <manifest:file-entry manifest:full-path="Pictures/100002010000031A000001EE710C6C8B4F8E1575.png" manifest:media-type="image/png"/>
  <manifest:file-entry manifest:full-path="Pictures/10000201000003E50000024E70D4BFF79EB4F2F1.png" manifest:media-type="image/png"/>
  <manifest:file-entry manifest:full-path="Pictures/10000201000003EE000002CF1162B967918F5730.png" manifest:media-type="image/png"/>
  <manifest:file-entry manifest:full-path="Pictures/10000201000003E5000001532685F20BC9F154FE.png" manifest:media-type="image/png"/>
  <manifest:file-entry manifest:full-path="Pictures/10000000000001510000001FDEADA9166A5917FE.png" manifest:media-type="image/png"/>
  <manifest:file-entry manifest:full-path="Pictures/1000000000000313000001D3B14001C78C262346.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 svg:font-family="'Lucida Sans'"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Helvetica Neue" svg:font-family="'Helvetica Neue'"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able_20_of_20_figures">
      <style:paragraph-properties fo:text-align="justify" style:justify-single-word="false">
        <style:tab-stops>
          <style:tab-stop style:position="7.722in" style:type="right" style:leader-style="dotted" style:leader-text="."/>
        </style:tab-stops>
      </style:paragraph-properties>
      <style:text-properties style:font-name="Calibri" style:font-name-complex="Calibri1"/>
    </style:style>
    <style:style style:name="P2" style:family="paragraph" style:parent-style-name="table_20_of_20_figures">
      <style:paragraph-properties fo:text-align="justify" style:justify-single-word="false">
        <style:tab-stops>
          <style:tab-stop style:position="7.722in" style:type="right" style:leader-style="dotted" style:leader-text="."/>
        </style:tab-stops>
      </style:paragraph-properties>
      <style:text-properties style:font-name="Calibri" fo:font-size="18pt" style:font-size-asian="18pt" style:font-name-complex="Calibri1"/>
    </style:style>
    <style:style style:name="P3" style:family="paragraph" style:parent-style-name="table_20_of_20_figures">
      <style:paragraph-properties fo:text-align="justify" style:justify-single-word="false">
        <style:tab-stops>
          <style:tab-stop style:position="7.722in" style:type="right" style:leader-style="dotted" style:leader-text="."/>
        </style:tab-stops>
      </style:paragraph-properties>
    </style:style>
    <style:style style:name="P4" style:family="paragraph" style:parent-style-name="table_20_of_20_figures">
      <style:paragraph-properties>
        <style:tab-stops>
          <style:tab-stop style:position="7.722in" style:type="right" style:leader-style="dotted" style:leader-text="."/>
        </style:tab-stops>
      </style:paragraph-properties>
    </style:style>
    <style:style style:name="P5" style:family="paragraph" style:parent-style-name="table_20_of_20_figures" style:master-page-name="Converted4">
      <style:paragraph-properties fo:text-align="justify" style:justify-single-word="false" style:page-number="auto">
        <style:tab-stops>
          <style:tab-stop style:position="7.722in" style:type="right" style:leader-style="dotted" style:leader-text="."/>
        </style:tab-stops>
      </style:paragraph-properties>
      <style:text-properties style:font-name="Calibri" style:font-name-complex="Calibri1"/>
    </style:style>
    <style:style style:name="P6" style:family="paragraph" style:parent-style-name="List_20_Paragraph" style:list-style-name="WWNum4">
      <style:paragraph-properties fo:line-height="150%" fo:text-align="justify" style:justify-single-word="false"/>
    </style:style>
    <style:style style:name="P7" style:family="paragraph" style:parent-style-name="List_20_Paragraph" style:list-style-name="WWNum4" style:master-page-name="Converted3">
      <style:paragraph-properties fo:line-height="150%" fo:text-align="justify" style:justify-single-word="false" style:page-number="auto" fo:break-before="page"/>
    </style:style>
    <style:style style:name="P8" style:family="paragraph" style:parent-style-name="Contents_20_1">
      <style:paragraph-properties>
        <style:tab-stops>
          <style:tab-stop style:position="7.722in" style:type="right" style:leader-style="dotted" style:leader-text="."/>
        </style:tab-stops>
      </style:paragraph-properties>
      <style:text-properties style:font-name="Calibri" style:font-name-asian="F" style:language-asian="fr" style:country-asian="FR" style:font-name-complex="F"/>
    </style:style>
    <style:style style:name="P9" style:family="paragraph" style:parent-style-name="Contents_20_1">
      <style:paragraph-properties>
        <style:tab-stops>
          <style:tab-stop style:position="7.722in" style:type="right" style:leader-style="dotted" style:leader-text="."/>
        </style:tab-stops>
      </style:paragraph-properties>
    </style:style>
    <style:style style:name="P10" style:family="paragraph" style:parent-style-name="Footer">
      <style:paragraph-properties>
        <style:tab-stops>
          <style:tab-stop style:position="2.6252in"/>
          <style:tab-stop style:position="3.15in" style:type="center"/>
          <style:tab-stop style:position="6.3in" style:type="right"/>
          <style:tab-stop style:position="7.7311in" style:type="right"/>
        </style:tab-stops>
      </style:paragraph-properties>
    </style:style>
    <style:style style:name="P11" style:family="paragraph" style:parent-style-name="Frame_20_contents">
      <style:text-properties fo:color="#222222" loext:opacity="100%" style:font-name="Calibri" fo:font-size="12pt" fo:background-color="#ffffff" style:font-size-asian="12pt" style:font-name-complex="Calibri1"/>
    </style:style>
    <style:style style:name="P12" style:family="paragraph" style:parent-style-name="Header">
      <style:paragraph-properties fo:text-align="center" style:justify-single-word="false"/>
    </style:style>
    <style:style style:name="P13" style:family="paragraph" style:parent-style-name="Heading_20_1">
      <style:paragraph-properties fo:margin-top="0.1807in" fo:margin-bottom="0in" style:contextual-spacing="false" fo:line-height="150%" fo:text-align="justify" style:justify-single-word="false">
        <style:tab-stops>
          <style:tab-stop style:position="0.5689in"/>
        </style:tab-stops>
      </style:paragraph-properties>
    </style:style>
    <style:style style:name="P14" style:family="paragraph" style:parent-style-name="Heading_20_1" style:list-style-name="WWNum4">
      <style:paragraph-properties fo:margin-top="0.1807in" fo:margin-bottom="0in" style:contextual-spacing="false" fo:line-height="150%" fo:text-align="justify" style:justify-single-word="false">
        <style:tab-stops>
          <style:tab-stop style:position="0.5689in"/>
        </style:tab-stops>
      </style:paragraph-properties>
    </style:style>
    <style:style style:name="P15" style:family="paragraph" style:parent-style-name="Heading_20_1">
      <style:paragraph-properties fo:margin-left="0in" fo:margin-right="0in" fo:margin-top="0.1807in" fo:margin-bottom="0in" style:contextual-spacing="false" fo:line-height="150%" fo:text-align="justify" style:justify-single-word="false" fo:text-indent="0in" style:auto-text-indent="false">
        <style:tab-stops>
          <style:tab-stop style:position="0.5689in"/>
        </style:tab-stops>
      </style:paragraph-properties>
    </style:style>
    <style:style style:name="P16" style:family="paragraph" style:parent-style-name="Heading_20_1">
      <style:paragraph-properties fo:margin-left="0in" fo:margin-right="0in" fo:margin-top="0.1665in" fo:margin-bottom="0in" style:contextual-spacing="false" fo:line-height="150%" fo:text-align="justify" style:justify-single-word="false" fo:text-indent="0in" style:auto-text-indent="false">
        <style:tab-stops>
          <style:tab-stop style:position="0.5689in"/>
        </style:tab-stops>
      </style:paragraph-properties>
    </style:style>
    <style:style style:name="P17" style:family="paragraph" style:parent-style-name="Heading_20_1">
      <style:paragraph-properties fo:margin-left="0.3193in" fo:margin-right="0in" fo:margin-top="0.1807in" fo:margin-bottom="0in" style:contextual-spacing="false" fo:line-height="150%" fo:text-align="justify" style:justify-single-word="false" fo:text-indent="-0.2492in" style:auto-text-indent="false">
        <style:tab-stops>
          <style:tab-stop style:position="0.5689in"/>
        </style:tab-stops>
      </style:paragraph-properties>
    </style:style>
    <style:style style:name="P18" style:family="paragraph" style:parent-style-name="Heading_20_1">
      <style:paragraph-properties fo:margin-left="0.3193in" fo:margin-right="0in" fo:margin-top="0.1807in" fo:margin-bottom="0in" style:contextual-spacing="false" fo:line-height="150%" fo:text-align="justify" style:justify-single-word="false" fo:text-indent="-0.2492in" style:auto-text-indent="false" fo:keep-with-next="always">
        <style:tab-stops>
          <style:tab-stop style:position="0.5689in"/>
        </style:tab-stops>
      </style:paragraph-properties>
      <style:text-properties style:font-name="Calibri" style:font-name-complex="Calibri1"/>
    </style:style>
    <style:style style:name="P19" style:family="paragraph" style:parent-style-name="Heading_20_1">
      <style:paragraph-properties fo:margin-left="0.3193in" fo:margin-right="0in" fo:margin-top="0.1807in" fo:margin-bottom="0in" style:contextual-spacing="false" fo:line-height="150%" fo:text-align="justify" style:justify-single-word="false" fo:text-indent="0in" style:auto-text-indent="false">
        <style:tab-stops>
          <style:tab-stop style:position="0.5689in"/>
        </style:tab-stops>
      </style:paragraph-properties>
    </style:style>
    <style:style style:name="P20" style:family="paragraph" style:parent-style-name="Heading_20_1" style:list-style-name="WWNum4">
      <style:paragraph-properties fo:margin-top="0.1665in" fo:margin-bottom="0in" style:contextual-spacing="false" fo:line-height="150%" fo:text-align="justify" style:justify-single-word="false">
        <style:tab-stops>
          <style:tab-stop style:position="0.5689in"/>
        </style:tab-stops>
      </style:paragraph-properties>
    </style:style>
    <style:style style:name="P21" style:family="paragraph" style:parent-style-name="Heading_20_1" style:list-style-name="WWNum14">
      <style:paragraph-properties fo:margin-top="0.1665in" fo:margin-bottom="0in" style:contextual-spacing="false" fo:line-height="150%" fo:text-align="justify" style:justify-single-word="false">
        <style:tab-stops>
          <style:tab-stop style:position="0.5689in"/>
        </style:tab-stops>
      </style:paragraph-properties>
    </style:style>
    <style:style style:name="P22" style:family="paragraph" style:parent-style-name="Heading_20_1" style:list-style-name="WWNum15">
      <style:paragraph-properties fo:margin-top="0.1665in" fo:margin-bottom="0in" style:contextual-spacing="false" fo:line-height="150%" fo:text-align="justify" style:justify-single-word="false">
        <style:tab-stops>
          <style:tab-stop style:position="0.5689in"/>
        </style:tab-stops>
      </style:paragraph-properties>
    </style:style>
    <style:style style:name="P23" style:family="paragraph" style:parent-style-name="Heading_20_1" style:list-style-name="WWNum16">
      <style:paragraph-properties fo:margin-top="0.1665in" fo:margin-bottom="0in" style:contextual-spacing="false" fo:line-height="150%" fo:text-align="justify" style:justify-single-word="false">
        <style:tab-stops>
          <style:tab-stop style:position="0.5689in"/>
        </style:tab-stops>
      </style:paragraph-properties>
    </style:style>
    <style:style style:name="P24" style:family="paragraph" style:parent-style-name="Heading_20_1" style:list-style-name="WWNum20">
      <style:paragraph-properties fo:margin-top="0.1665in" fo:margin-bottom="0in" style:contextual-spacing="false" fo:line-height="150%" fo:text-align="justify" style:justify-single-word="false">
        <style:tab-stops>
          <style:tab-stop style:position="0.5689in"/>
        </style:tab-stops>
      </style:paragraph-properties>
    </style:style>
    <style:style style:name="P25" style:family="paragraph" style:parent-style-name="Heading_20_1" style:list-style-name="WWNum21">
      <style:paragraph-properties fo:margin-top="0.1665in" fo:margin-bottom="0in" style:contextual-spacing="false" fo:line-height="150%" fo:text-align="justify" style:justify-single-word="false">
        <style:tab-stops>
          <style:tab-stop style:position="0.5689in"/>
        </style:tab-stops>
      </style:paragraph-properties>
    </style:style>
    <style:style style:name="P26" style:family="paragraph" style:parent-style-name="Heading_20_1" style:list-style-name="WWNum4">
      <style:paragraph-properties fo:margin-top="0.1665in" fo:margin-bottom="0in" style:contextual-spacing="false" fo:line-height="150%" fo:text-align="justify" style:justify-single-word="false" fo:break-before="page">
        <style:tab-stops>
          <style:tab-stop style:position="0.5689in"/>
        </style:tab-stops>
      </style:paragraph-properties>
    </style:style>
    <style:style style:name="P27" style:family="paragraph" style:parent-style-name="Heading_20_1">
      <style:paragraph-properties fo:margin-top="0.1665in" fo:margin-bottom="0in" style:contextual-spacing="false" fo:line-height="150%" fo:text-align="justify" style:justify-single-word="false" fo:keep-with-next="always">
        <style:tab-stops>
          <style:tab-stop style:position="0.5689in"/>
        </style:tab-stops>
      </style:paragraph-properties>
    </style:style>
    <style:style style:name="P28" style:family="paragraph" style:parent-style-name="Heading_20_1">
      <style:paragraph-properties fo:margin-left="0.3189in" fo:margin-right="0in" fo:margin-top="0.1665in" fo:margin-bottom="0in" style:contextual-spacing="false" fo:line-height="150%" fo:text-align="justify" style:justify-single-word="false" fo:text-indent="0in" style:auto-text-indent="false">
        <style:tab-stops>
          <style:tab-stop style:position="0.5689in"/>
        </style:tab-stops>
      </style:paragraph-properties>
    </style:style>
    <style:style style:name="P29" style:family="paragraph" style:parent-style-name="Heading_20_1">
      <style:paragraph-properties fo:margin-left="0.5693in" fo:margin-right="0in" fo:margin-top="0.1665in" fo:margin-bottom="0in" style:contextual-spacing="false" fo:line-height="150%" fo:text-align="justify" style:justify-single-word="false" fo:text-indent="0in" style:auto-text-indent="false">
        <style:tab-stops>
          <style:tab-stop style:position="0.5689in"/>
        </style:tab-stops>
      </style:paragraph-properties>
    </style:style>
    <style:style style:name="P30" style:family="paragraph" style:parent-style-name="Heading_20_1">
      <style:paragraph-properties fo:margin-left="0.5693in" fo:margin-right="0in" fo:margin-top="0.1665in" fo:margin-bottom="0in" style:contextual-spacing="false" fo:line-height="150%" fo:text-align="justify" style:justify-single-word="false" fo:text-indent="0in" style:auto-text-indent="false" fo:keep-with-next="always">
        <style:tab-stops>
          <style:tab-stop style:position="0.5689in"/>
        </style:tab-stops>
      </style:paragraph-properties>
    </style:style>
    <style:style style:name="P31" style:family="paragraph" style:parent-style-name="Heading_20_1" style:list-style-name="WWNum4">
      <style:paragraph-properties fo:margin-left="0.3189in" fo:margin-right="0in" fo:margin-top="0.1665in" fo:margin-bottom="0in" style:contextual-spacing="false" fo:line-height="150%" fo:text-align="justify" style:justify-single-word="false" fo:text-indent="-0.5in" style:auto-text-indent="false" fo:break-before="page">
        <style:tab-stops>
          <style:tab-stop style:position="0.5689in"/>
        </style:tab-stops>
      </style:paragraph-properties>
    </style:style>
    <style:style style:name="P32" style:family="paragraph" style:parent-style-name="Heading_20_2">
      <style:paragraph-properties fo:margin-left="0.3193in" fo:margin-right="0in" fo:line-height="150%" fo:text-align="justify" style:justify-single-word="false" fo:text-indent="0in" style:auto-text-indent="false"/>
    </style:style>
    <style:style style:name="P33" style:family="paragraph" style:parent-style-name="Normal_20__28_Web_29_">
      <style:paragraph-properties fo:margin-top="0in" fo:margin-bottom="0in" style:contextual-spacing="false" fo:line-height="150%" fo:text-align="justify" style:justify-single-word="false"/>
    </style:style>
    <style:style style:name="P34" style:family="paragraph" style:parent-style-name="Normal_20__28_Web_29_">
      <style:paragraph-properties fo:margin-top="0in" fo:margin-bottom="0in" style:contextual-spacing="false"/>
    </style:style>
    <style:style style:name="P35" style:family="paragraph" style:parent-style-name="Normal_20__28_Web_29_">
      <style:paragraph-properties fo:margin-left="0.5in" fo:margin-right="0in" fo:margin-top="0in" fo:margin-bottom="0in" style:contextual-spacing="false" fo:line-height="150%" fo:text-align="justify" style:justify-single-word="false" fo:text-indent="0in" style:auto-text-indent="false" fo:keep-with-next="always"/>
    </style:style>
    <style:style style:name="P36" style:family="paragraph" style:parent-style-name="Normal_20__28_Web_29_">
      <loext:graphic-properties draw:fill="solid" draw:fill-color="#ffffff"/>
      <style:paragraph-properties fo:margin-top="0.1945in" fo:margin-bottom="0.1945in" style:contextual-spacing="false" fo:line-height="150%" fo:text-align="justify" style:justify-single-word="false" fo:background-color="#ffffff"/>
    </style:style>
    <style:style style:name="P37" style:family="paragraph" style:parent-style-name="Normal_20__28_Web_29_">
      <loext:graphic-properties draw:fill="solid" draw:fill-color="#ffffff"/>
      <style:paragraph-properties fo:margin-top="0.1945in" fo:margin-bottom="0.1945in" style:contextual-spacing="false" fo:line-height="150%" fo:text-align="justify" style:justify-single-word="false" fo:background-color="#ffffff"/>
      <style:text-properties fo:color="#222222" loext:opacity="100%" style:font-name="Calibri" fo:background-color="#ffffff" style:font-name-asian="Calibri1" style:language-asian="en" style:country-asian="US" style:font-name-complex="Calibri1" style:font-size-complex="11pt"/>
    </style:style>
    <style:style style:name="P38" style:family="paragraph" style:parent-style-name="Standard">
      <style:paragraph-properties fo:line-height="150%"/>
      <style:text-properties style:font-name="Calibri" style:font-name-complex="Calibri1"/>
    </style:style>
    <style:style style:name="P39" style:family="paragraph" style:parent-style-name="Standard">
      <style:paragraph-properties fo:line-height="150%" fo:text-align="justify" style:justify-single-word="false"/>
      <style:text-properties style:font-name="Calibri" style:font-name-complex="Calibri1"/>
    </style:style>
    <style:style style:name="P40" style:family="paragraph" style:parent-style-name="Standard">
      <style:text-properties style:font-name="Calibri" fo:font-size="14pt" style:font-size-asian="14pt" style:font-name-complex="Calibri1"/>
    </style:style>
    <style:style style:name="P41" style:family="paragraph" style:parent-style-name="Standard">
      <style:paragraph-properties fo:text-align="end" style:justify-single-word="false"/>
      <style:text-properties style:font-name="Calibri" fo:font-size="14pt" style:font-size-asian="14pt" style:font-name-complex="Calibri1"/>
    </style:style>
    <style:style style:name="P42" style:family="paragraph" style:parent-style-name="Standard">
      <style:paragraph-properties fo:line-height="150%" fo:text-align="justify" style:justify-single-word="false" fo:orphans="2" fo:widows="2"/>
      <style:text-properties style:font-name="Calibri" fo:font-size="12pt" style:font-name-asian="Times New Roman1" style:font-size-asian="12pt" style:language-asian="fr" style:country-asian="FR" style:font-name-complex="Calibri1" style:font-size-complex="12pt"/>
    </style:style>
    <style:style style:name="P43" style:family="paragraph" style:parent-style-name="Standard">
      <style:paragraph-properties fo:line-height="150%"/>
    </style:style>
    <style:style style:name="P44" style:family="paragraph" style:parent-style-name="Standard">
      <style:paragraph-properties fo:line-height="150%" fo:text-align="justify" style:justify-single-word="false"/>
    </style:style>
    <style:style style:name="P45" style:family="paragraph" style:parent-style-name="Standard">
      <style:paragraph-properties fo:line-height="150%" fo:text-align="justify" style:justify-single-word="false" fo:orphans="2" fo:widows="2"/>
    </style:style>
    <style:style style:name="P46" style:family="paragraph" style:parent-style-name="Standard">
      <loext:graphic-properties draw:fill="solid" draw:fill-color="#ffffff"/>
      <style:paragraph-properties fo:line-height="150%" fo:text-align="justify" style:justify-single-word="false" fo:orphans="2" fo:widows="2" fo:background-color="#ffffff"/>
    </style:style>
    <style:style style:name="P47" style:family="paragraph" style:parent-style-name="Standard">
      <style:paragraph-properties fo:line-height="150%" fo:text-align="justify" style:justify-single-word="false"/>
      <style:text-properties fo:color="#f79646" loext:opacity="100%" style:font-name="Calibri" style:font-name-complex="Calibri1"/>
    </style:style>
    <style:style style:name="P48" style:family="paragraph" style:parent-style-name="Standard">
      <style:paragraph-properties fo:line-height="150%" fo:text-align="justify" style:justify-single-word="false"/>
      <style:text-properties fo:color="#f79646" loext:opacity="100%" style:font-name="Calibri" fo:font-size="16pt" style:font-name-asian="Calibri Light1" style:font-size-asian="16pt" style:font-name-complex="Calibri1" style:font-size-complex="16pt"/>
    </style:style>
    <style:style style:name="P49" style:family="paragraph" style:parent-style-name="Standard">
      <style:paragraph-properties fo:line-height="150%" fo:text-align="justify" style:justify-single-word="false"/>
      <style:text-properties fo:color="#222222" loext:opacity="100%" style:font-name="Calibri" fo:font-size="14pt" fo:background-color="#ffffff" style:font-size-asian="14pt" style:font-name-complex="Calibri1"/>
    </style:style>
    <style:style style:name="P50" style:family="paragraph" style:parent-style-name="Standard">
      <style:paragraph-properties fo:line-height="150%" fo:text-align="justify" style:justify-single-word="false"/>
      <style:text-properties fo:color="#222222" loext:opacity="100%" style:font-name="Calibri" fo:font-size="12pt" style:font-name-asian="Times New Roman1" style:font-size-asian="12pt" style:language-asian="fr" style:country-asian="FR" style:font-name-complex="Calibri1" style:font-size-complex="12pt"/>
    </style:style>
    <style:style style:name="P51" style:family="paragraph" style:parent-style-name="Standard">
      <loext:graphic-properties draw:fill="solid" draw:fill-color="#ffffff"/>
      <style:paragraph-properties fo:line-height="150%" fo:text-align="justify" style:justify-single-word="false" fo:orphans="2" fo:widows="2" fo:background-color="#ffffff"/>
      <style:text-properties fo:color="#222222" loext:opacity="100%" style:font-name="Calibri" fo:font-size="12pt" style:font-name-asian="Times New Roman1" style:font-size-asian="12pt" style:language-asian="fr" style:country-asian="FR" style:font-name-complex="Calibri1" style:font-size-complex="12pt"/>
    </style:style>
    <style:style style:name="P52" style:family="paragraph" style:parent-style-name="Standard">
      <style:paragraph-properties fo:line-height="150%" fo:text-align="justify" style:justify-single-word="false"/>
      <style:text-properties fo:color="#222222" loext:opacity="100%" style:font-name="Calibri" fo:background-color="#ffffff" style:font-name-complex="Calibri1"/>
    </style:style>
    <style:style style:name="P53" style:family="paragraph" style:parent-style-name="Standard">
      <loext:graphic-properties draw:fill="solid" draw:fill-color="#ffffff"/>
      <style:paragraph-properties fo:line-height="150%" fo:text-align="justify" style:justify-single-word="false" fo:orphans="2" fo:widows="2" fo:background-color="#ffffff"/>
      <style:text-properties fo:color="#000000" loext:opacity="100%" style:font-name="Calibri" fo:font-size="12pt" style:font-name-asian="Times New Roman1" style:font-size-asian="12pt" style:language-asian="fr" style:country-asian="FR" style:font-name-complex="Calibri1" style:font-size-complex="12pt"/>
    </style:style>
    <style:style style:name="P54" style:family="paragraph" style:parent-style-name="Standard">
      <style:paragraph-properties fo:margin-left="0in" fo:margin-right="0.4791in" fo:text-align="end" style:justify-single-word="false" fo:text-indent="0in" style:auto-text-indent="false"/>
      <style:text-properties fo:color="#1d2024" loext:opacity="100%" style:font-name="Calibri" fo:font-size="14pt" fo:font-weight="bold" style:font-size-asian="14pt" style:font-weight-asian="bold" style:font-name-complex="Calibri1"/>
    </style:style>
    <style:style style:name="P55" style:family="paragraph" style:parent-style-name="Standard">
      <style:paragraph-properties fo:margin-left="0in" fo:margin-right="0.4791in" fo:text-align="center" style:justify-single-word="false" fo:text-indent="0in" style:auto-text-indent="false"/>
      <style:text-properties fo:color="#1d2024" loext:opacity="100%" style:font-name="Calibri" fo:font-size="14pt" fo:font-weight="bold" style:font-size-asian="14pt" style:font-weight-asian="bold" style:font-name-complex="Calibri1"/>
    </style:style>
    <style:style style:name="P56" style:family="paragraph" style:parent-style-name="Standard">
      <style:paragraph-properties fo:margin-left="5.5in" fo:margin-right="0.4791in" fo:text-align="center" style:justify-single-word="false" fo:text-indent="0.5in" style:auto-text-indent="false"/>
      <style:text-properties fo:color="#1d2024" loext:opacity="100%" style:font-name="Calibri" fo:font-size="14pt" fo:font-weight="bold" style:font-size-asian="14pt" style:font-weight-asian="bold" style:font-name-complex="Calibri1"/>
    </style:style>
    <style:style style:name="P57" style:family="paragraph" style:parent-style-name="Standard">
      <style:paragraph-properties fo:margin-left="5.5in" fo:margin-right="0.4791in" fo:text-align="center" style:justify-single-word="false" fo:text-indent="0.5in" style:auto-text-indent="false"/>
    </style:style>
    <style:style style:name="P58" style:family="paragraph" style:parent-style-name="Standard">
      <style:paragraph-properties fo:margin-left="0.3189in" fo:margin-right="0in" fo:line-height="150%" fo:text-align="justify" style:justify-single-word="false" fo:text-indent="0in" style:auto-text-indent="false"/>
    </style:style>
    <style:style style:name="P59" style:family="paragraph" style:parent-style-name="Standard">
      <style:paragraph-properties fo:margin-left="0.3189in" fo:margin-right="0in" fo:line-height="150%" fo:text-align="justify" style:justify-single-word="false" fo:orphans="2" fo:widows="2" fo:text-indent="0in" style:auto-text-indent="false"/>
    </style:style>
    <style:style style:name="P60" style:family="paragraph" style:parent-style-name="Standard">
      <style:paragraph-properties fo:margin-left="0.3189in" fo:margin-right="0in" fo:line-height="150%" fo:text-align="justify" style:justify-single-word="false" fo:orphans="2" fo:widows="2" fo:text-indent="0in" style:auto-text-indent="false"/>
      <style:text-properties fo:color="#0e0e0e" loext:opacity="100%" style:font-name="Calibri" fo:font-size="12pt" fo:font-weight="bold" style:font-name-asian="Times New Roman1" style:font-size-asian="12pt" style:language-asian="fr" style:country-asian="FR" style:font-weight-asian="bold" style:font-name-complex="Calibri1" style:font-size-complex="12pt" style:font-weight-complex="bold"/>
    </style:style>
    <style:style style:name="P61" style:family="paragraph" style:parent-style-name="Standard">
      <style:paragraph-properties fo:margin-left="0.3189in" fo:margin-right="0in" fo:line-height="150%" fo:text-align="justify" style:justify-single-word="false" fo:orphans="2" fo:widows="2" fo:text-indent="0in" style:auto-text-indent="false"/>
      <style:text-properties fo:color="#0e0e0e" loext:opacity="100%" style:font-name="Calibri" fo:font-size="12pt" style:font-name-asian="Times New Roman1" style:font-size-asian="12pt" style:language-asian="fr" style:country-asian="FR" style:font-name-complex="Calibri1" style:font-size-complex="12pt"/>
    </style:style>
    <style:style style:name="P62" style:family="paragraph" style:parent-style-name="Standard">
      <style:paragraph-properties fo:margin-left="0.3189in" fo:margin-right="0in" fo:line-height="150%" fo:text-align="justify" style:justify-single-word="false" fo:orphans="2" fo:widows="2" fo:text-indent="0in" style:auto-text-indent="false"/>
      <style:text-properties style:font-name="Calibri" fo:font-size="12pt" style:font-name-asian="Times New Roman1" style:font-size-asian="12pt" style:language-asian="fr" style:country-asian="FR" style:font-name-complex="Calibri1" style:font-size-complex="12pt"/>
    </style:style>
    <style:style style:name="P63" style:family="paragraph" style:parent-style-name="Standard">
      <style:paragraph-properties fo:margin-left="0.3189in" fo:margin-right="0in" fo:line-height="150%" fo:text-align="justify" style:justify-single-word="false" fo:text-indent="0in" style:auto-text-indent="false"/>
      <style:text-properties style:font-name="Calibri" style:font-name-complex="Calibri1"/>
    </style:style>
    <style:style style:name="P64" style:family="paragraph" style:parent-style-name="Standard">
      <style:paragraph-properties fo:margin-left="0.3189in" fo:margin-right="0in" fo:line-height="150%" fo:text-align="justify" style:justify-single-word="false" fo:text-indent="0in" style:auto-text-indent="false"/>
      <style:text-properties fo:color="#222222" loext:opacity="100%" style:font-name="Calibri" fo:font-size="12pt" fo:background-color="#ffffff" style:font-size-asian="12pt" style:font-name-complex="Calibri1"/>
    </style:style>
    <style:style style:name="P65" style:family="paragraph" style:parent-style-name="Standard">
      <style:paragraph-properties fo:margin-left="0.3189in" fo:margin-right="0in" fo:line-height="150%" fo:text-align="justify" style:justify-single-word="false" fo:text-indent="0in" style:auto-text-indent="false"/>
      <style:text-properties fo:color="#222222" loext:opacity="100%" style:font-name="Calibri" fo:background-color="#ffffff" style:font-name-complex="Calibri1"/>
    </style:style>
    <style:style style:name="P66" style:family="paragraph" style:parent-style-name="Standard">
      <style:paragraph-properties fo:line-height="150%" fo:text-align="justify" style:justify-single-word="false" fo:keep-with-next="always"/>
      <style:text-properties style:font-name="Calibri" fo:font-size="12pt" style:font-size-asian="12pt" style:font-name-complex="Calibri1"/>
    </style:style>
    <style:style style:name="P67" style:family="paragraph" style:parent-style-name="Standard">
      <style:paragraph-properties fo:line-height="150%" fo:text-align="justify" style:justify-single-word="false" fo:break-before="page"/>
      <style:text-properties style:font-name="Calibri" style:font-name-complex="Calibri1"/>
    </style:style>
    <style:style style:name="P68" style:family="paragraph" style:parent-style-name="Standard">
      <loext:graphic-properties draw:fill="solid" draw:fill-color="#ffffff"/>
      <style:paragraph-properties fo:margin-top="0.1945in" fo:margin-bottom="0.1945in" style:contextual-spacing="false" fo:line-height="150%" fo:text-align="justify" style:justify-single-word="false" fo:orphans="2" fo:widows="2" fo:background-color="#ffffff"/>
    </style:style>
    <style:style style:name="P69" style:family="paragraph" style:parent-style-name="Standard">
      <loext:graphic-properties draw:fill="solid" draw:fill-color="#ffffff"/>
      <style:paragraph-properties fo:margin-top="0.1945in" fo:margin-bottom="0.1945in" style:contextual-spacing="false" fo:line-height="150%" fo:text-align="justify" style:justify-single-word="false" fo:orphans="2" fo:widows="2" fo:background-color="#ffffff" fo:keep-with-next="always"/>
    </style:style>
    <style:style style:name="P70" style:family="paragraph" style:parent-style-name="Standard" style:list-style-name="WWNum24">
      <loext:graphic-properties draw:fill="solid" draw:fill-color="#ffffff"/>
      <style:paragraph-properties fo:margin-left="0.6563in" fo:margin-right="0in" fo:margin-top="0.1945in" fo:margin-bottom="0in" style:contextual-spacing="false" fo:line-height="150%" fo:text-align="justify" style:justify-single-word="false" fo:orphans="2" fo:widows="2" fo:text-indent="-0.25in" style:auto-text-indent="false" fo:background-color="#ffffff"/>
    </style:style>
    <style:style style:name="P71" style:family="paragraph" style:parent-style-name="Standard" style:list-style-name="WWNum24">
      <loext:graphic-properties draw:fill="solid" draw:fill-color="#ffffff"/>
      <style:paragraph-properties fo:margin-left="0.6563in" fo:margin-right="0in" fo:margin-top="0in" fo:margin-bottom="0.1945in" style:contextual-spacing="false" fo:line-height="150%" fo:text-align="justify" style:justify-single-word="false" fo:orphans="2" fo:widows="2" fo:text-indent="-0.25in" style:auto-text-indent="false" fo:background-color="#ffffff"/>
    </style:style>
    <style:style style:name="P72" style:family="paragraph" style:parent-style-name="Standard">
      <style:paragraph-properties fo:margin-top="0.1264in" fo:margin-bottom="0in" style:contextual-spacing="false" fo:line-height="150%" fo:text-align="justify" style:justify-single-word="false"/>
      <style:text-properties fo:color="#44536a" loext:opacity="100%" style:font-name="Calibri" fo:font-size="9pt" fo:letter-spacing="-0.0016in" fo:font-style="italic" style:font-size-asian="9pt" style:font-style-asian="italic" style:font-name-complex="Calibri1"/>
    </style:style>
    <style:style style:name="P73" style:family="paragraph" style:parent-style-name="Standard">
      <style:paragraph-properties fo:margin-top="0.1264in" fo:margin-bottom="0in" style:contextual-spacing="false" fo:line-height="150%" fo:text-align="justify" style:justify-single-word="false"/>
      <style:text-properties style:font-name="Calibri" fo:font-size="9pt" fo:font-style="italic" style:font-size-asian="9pt" style:font-style-asian="italic" style:font-name-complex="Calibri1"/>
    </style:style>
    <style:style style:name="P74" style:family="paragraph" style:parent-style-name="Standard">
      <style:paragraph-properties fo:margin-left="0.0693in" fo:margin-right="0in" fo:margin-top="0.1264in" fo:margin-bottom="0in" style:contextual-spacing="false" fo:line-height="150%" fo:text-align="justify" style:justify-single-word="false" fo:text-indent="0in" style:auto-text-indent="false"/>
      <style:text-properties fo:color="#44536a" loext:opacity="100%" style:font-name="Calibri" fo:font-size="9pt" fo:letter-spacing="-0.0016in" fo:font-style="italic" style:font-size-asian="9pt" style:font-style-asian="italic" style:font-name-complex="Calibri1"/>
    </style:style>
    <style:style style:name="P75" style:family="paragraph" style:parent-style-name="Standard">
      <style:paragraph-properties fo:margin-top="0.1382in" fo:margin-bottom="0in" style:contextual-spacing="false" fo:line-height="150%" fo:text-align="justify" style:justify-single-word="false"/>
      <style:text-properties fo:color="#44536a" loext:opacity="100%" style:font-name="Calibri" fo:font-size="9pt" fo:letter-spacing="-0.0028in" fo:font-style="italic" style:font-size-asian="9pt" style:font-style-asian="italic" style:font-name-complex="Calibri1"/>
    </style:style>
    <style:style style:name="P76" style:family="paragraph" style:parent-style-name="Standard" style:master-page-name="Converted2">
      <style:paragraph-properties fo:line-height="150%" fo:text-align="justify" style:justify-single-word="false" style:page-number="auto"/>
      <style:text-properties fo:color="#f79646" loext:opacity="100%" style:font-name="Calibri" fo:font-size="16pt" style:font-name-asian="Calibri Light1" style:font-size-asian="16pt" style:font-name-complex="Calibri1" style:font-size-complex="16pt"/>
    </style:style>
    <style:style style:name="P77" style:family="paragraph" style:parent-style-name="Standard">
      <style:paragraph-properties fo:margin-left="0.8098in" fo:margin-right="0in" fo:line-height="150%" fo:text-align="justify" style:justify-single-word="false" fo:text-indent="0in" style:auto-text-indent="false"/>
      <style:text-properties style:font-name="Calibri" fo:font-size="12pt" style:font-size-asian="12pt" style:font-name-complex="Calibri1" style:font-size-complex="16pt"/>
    </style:style>
    <style:style style:name="P78" style:family="paragraph" style:parent-style-name="TOC_20_Heading">
      <style:paragraph-properties fo:break-before="page"/>
    </style:style>
    <style:style style:name="P79" style:family="paragraph" style:parent-style-name="Text_20_body">
      <style:text-properties style:font-name="Calibri" fo:font-size="32pt" style:font-size-asian="32pt" style:font-name-complex="Calibri1"/>
    </style:style>
    <style:style style:name="P80" style:family="paragraph" style:parent-style-name="Text_20_body" style:master-page-name="First_20_Page">
      <style:paragraph-properties style:page-number="auto"/>
    </style:style>
    <style:style style:name="P81" style:family="paragraph" style:parent-style-name="Text_20_body" style:master-page-name="Converted1">
      <style:paragraph-properties fo:margin-left="0in" fo:margin-right="0.3839in" fo:margin-top="0.0217in" fo:margin-bottom="0in" style:contextual-spacing="false" fo:line-height="150%" fo:text-align="justify" style:justify-single-word="false" fo:text-indent="0in" style:auto-text-indent="false" style:page-number="auto"/>
      <style:text-properties style:font-name="Calibri" fo:font-size="12pt" style:font-size-asian="12pt" style:font-name-complex="Calibri1"/>
    </style:style>
    <style:style style:name="P82" style:family="paragraph" style:parent-style-name="Text_20_body">
      <style:paragraph-properties fo:margin-top="0.0457in" fo:margin-bottom="0in" style:contextual-spacing="false" fo:line-height="150%" fo:text-align="justify" style:justify-single-word="false"/>
    </style:style>
    <style:style style:name="P83" style:family="paragraph" style:parent-style-name="Text_20_body" style:list-style-name="WWNum32">
      <style:paragraph-properties fo:margin-top="0.0457in" fo:margin-bottom="0in" style:contextual-spacing="false" fo:line-height="150%" fo:text-align="justify" style:justify-single-word="false"/>
    </style:style>
    <style:style style:name="P84" style:family="paragraph" style:parent-style-name="Text_20_body" style:list-style-name="WWNum12">
      <style:paragraph-properties fo:margin-top="0.0457in" fo:margin-bottom="0in" style:contextual-spacing="false" fo:line-height="150%" fo:text-align="justify" style:justify-single-word="false"/>
    </style:style>
    <style:style style:name="P85" style:family="paragraph" style:parent-style-name="Text_20_body">
      <style:paragraph-properties fo:margin-left="0in" fo:margin-right="0in" fo:margin-top="0.0457in" fo:margin-bottom="0in" style:contextual-spacing="false" fo:line-height="150%" fo:text-align="justify" style:justify-single-word="false" fo:text-indent="0.25in" style:auto-text-indent="false"/>
      <style:text-properties fo:color="#222222" loext:opacity="100%" style:font-name="Calibri" style:font-name-complex="Calibri1"/>
    </style:style>
    <style:style style:name="P86" style:family="paragraph" style:parent-style-name="Text_20_body">
      <style:paragraph-properties fo:margin-left="0.8189in" fo:margin-right="0in" fo:margin-top="0.0457in" fo:margin-bottom="0in" style:contextual-spacing="false" fo:line-height="150%" fo:text-align="justify" style:justify-single-word="false" fo:text-indent="0in" style:auto-text-indent="false"/>
      <style:text-properties fo:color="#f79646" loext:opacity="100%" style:font-name="Calibri" fo:font-size="16pt" fo:font-style="italic" style:font-size-asian="16pt" style:font-style-asian="italic" style:font-name-complex="Calibri1"/>
    </style:style>
    <style:style style:name="P87" style:family="paragraph" style:parent-style-name="Title">
      <style:paragraph-properties fo:margin-left="0in" fo:margin-right="0in" fo:text-indent="0.5in" style:auto-text-indent="false"/>
      <style:text-properties fo:color="#ffffff" loext:opacity="100%" style:font-name="Calibri" fo:font-size="36pt" style:text-underline-style="solid" style:text-underline-width="auto" style:text-underline-color="font-color" style:font-size-asian="36pt" style:font-name-complex="Calibri1" style:font-size-complex="36pt"/>
    </style:style>
    <style:style style:name="P88" style:family="paragraph" style:parent-style-name="Title">
      <style:paragraph-properties fo:margin-left="0in" fo:margin-right="0in" fo:text-indent="0.5in" style:auto-text-indent="false"/>
      <style:text-properties style:font-name="Calibri" fo:font-size="36pt" style:font-size-asian="36pt" style:font-name-complex="Calibri1" style:font-size-complex="36pt"/>
    </style:style>
    <style:style style:name="P89" style:family="paragraph" style:parent-style-name="caption">
      <style:paragraph-properties fo:line-height="150%" fo:text-align="justify" style:justify-single-word="false"/>
    </style:style>
    <style:style style:name="P90" style:family="paragraph">
      <loext:graphic-properties draw:fill="solid" draw:fill-color="#ffffff"/>
      <style:paragraph-properties fo:text-align="start"/>
      <style:text-properties fo:font-size="18pt"/>
    </style:style>
    <style:style style:name="P91" style:family="paragraph">
      <loext:graphic-properties draw:fill="none"/>
      <style:paragraph-properties fo:text-align="start"/>
      <style:text-properties fo:font-size="18pt"/>
    </style:style>
    <style:style style:name="T1" style:family="text">
      <style:text-properties fo:font-size="48pt" style:font-size-asian="48pt" style:font-size-complex="48pt"/>
    </style:style>
    <style:style style:name="T2" style:family="text">
      <style:text-properties fo:font-size="48pt" fo:letter-spacing="-0.0016in" style:font-size-asian="48pt" style:font-size-complex="48pt"/>
    </style:style>
    <style:style style:name="T3" style:family="text">
      <style:text-properties fo:font-size="48pt" fo:letter-spacing="-0.0028in" style:font-size-asian="48pt" style:font-size-complex="48pt"/>
    </style:style>
    <style:style style:name="T4" style:family="text">
      <style:text-properties fo:font-size="36pt" fo:letter-spacing="-0.0028in" style:font-size-asian="36pt" style:font-size-complex="36pt"/>
    </style:style>
    <style:style style:name="T5" style:family="text">
      <style:text-properties fo:font-size="36pt" style:font-size-asian="36pt" style:font-size-complex="36pt"/>
    </style:style>
    <style:style style:name="T6" style:family="text">
      <style:text-properties fo:color="#1d2024" loext:opacity="100%" style:font-name="Calibri" fo:font-size="14pt" fo:font-weight="bold" style:font-size-asian="14pt" style:font-weight-asian="bold" style:font-name-complex="Calibri1"/>
    </style:style>
    <style:style style:name="T7" style:family="text">
      <style:text-properties style:font-name="Calibri" fo:font-size="14pt" fo:font-weight="bold" style:font-size-asian="14pt" style:font-weight-asian="bold" style:font-name-complex="Calibri1"/>
    </style:style>
    <style:style style:name="T8" style:family="text">
      <style:text-properties style:font-name="Calibri" fo:font-size="14pt" style:font-size-asian="14pt" style:font-name-complex="Calibri1" style:font-size-complex="16pt"/>
    </style:style>
    <style:style style:name="T9" style:family="text">
      <style:text-properties style:font-name="Calibri" style:font-name-asian="F" style:language-asian="fr" style:country-asian="FR" style:font-name-complex="F"/>
    </style:style>
    <style:style style:name="T10" style:family="text">
      <style:text-properties style:font-name="Calibri" fo:font-size="12pt" style:font-size-asian="12pt" style:font-name-complex="Calibri1" style:font-size-complex="12pt"/>
    </style:style>
    <style:style style:name="T11" style:family="text">
      <style:text-properties style:font-name="Calibri" fo:font-size="12pt" style:font-size-asian="12pt" style:font-name-complex="Calibri1"/>
    </style:style>
    <style:style style:name="T12" style:family="text">
      <style:text-properties style:font-name="Calibri" fo:font-size="12pt" style:text-underline-style="solid" style:text-underline-width="auto" style:text-underline-color="font-color" fo:font-weight="bold" style:font-size-asian="12pt" style:font-weight-asian="bold" style:font-name-complex="Calibri1" style:font-size-complex="12pt" style:font-weight-complex="bold"/>
    </style:style>
    <style:style style:name="T13" style:family="text">
      <style:text-properties style:font-name="Calibri" fo:font-size="12pt" fo:font-weight="bold" style:font-size-asian="12pt" style:font-weight-asian="bold" style:font-name-complex="Calibri1" style:font-size-complex="12pt" style:font-weight-complex="bold"/>
    </style:style>
    <style:style style:name="T14" style:family="text">
      <style:text-properties style:font-name="Calibri" fo:font-size="12pt" style:font-name-asian="Times New Roman1" style:font-size-asian="12pt" style:language-asian="fr" style:country-asian="FR" style:font-name-complex="Calibri1" style:font-size-complex="12pt"/>
    </style:style>
    <style:style style:name="T15" style:family="text">
      <style:text-properties style:font-name="Calibri" style:font-name-complex="Calibri1"/>
    </style:style>
    <style:style style:name="T16" style:family="text">
      <style:text-properties style:font-name="Calibri" style:language-asian="fr" style:country-asian="FR" style:font-name-complex="Calibri1"/>
    </style:style>
    <style:style style:name="T17" style:family="text">
      <style:text-properties style:font-name="Calibri" fo:font-size="18pt" style:font-size-asian="18pt" style:font-name-complex="Calibri1" style:font-size-complex="16pt"/>
    </style:style>
    <style:style style:name="T18" style:family="text">
      <style:text-properties style:font-name="Calibri" fo:font-size="18pt" style:font-size-asian="18pt" style:font-name-complex="Calibri1"/>
    </style:style>
    <style:style style:name="T19" style:family="text">
      <style:text-properties style:use-window-font-color="true" loext:opacity="0%" style:font-name-complex="Calibri1"/>
    </style:style>
    <style:style style:name="T20" style:family="text">
      <style:text-properties style:use-window-font-color="true" loext:opacity="0%" fo:letter-spacing="-0.0071in" style:font-name-complex="Calibri1"/>
    </style:style>
    <style:style style:name="T21" style:family="text">
      <style:text-properties style:use-window-font-color="true" loext:opacity="0%" fo:letter-spacing="-0.0075in" style:font-name-complex="Calibri1"/>
    </style:style>
    <style:style style:name="T22" style:family="text">
      <style:text-properties style:use-window-font-color="true" loext:opacity="0%" fo:letter-spacing="-0.0055in" style:font-name-complex="Calibri1"/>
    </style:style>
    <style:style style:name="T23" style:family="text">
      <style:text-properties style:use-window-font-color="true" loext:opacity="0%" style:text-underline-style="none"/>
    </style:style>
    <style:style style:name="T24" style:family="text">
      <style:text-properties style:use-window-font-color="true" loext:opacity="0%"/>
    </style:style>
    <style:style style:name="T25" style:family="text">
      <style:text-properties style:use-window-font-color="true" loext:opacity="0%" fo:font-size="11pt" fo:font-style="normal" style:font-size-asian="11pt" style:font-style-asian="normal"/>
    </style:style>
    <style:style style:name="T26" style:family="text">
      <style:text-properties style:use-window-font-color="true" loext:opacity="0%" style:font-name="Calibri" fo:font-size="11pt" fo:font-style="normal" style:font-size-asian="11pt" style:font-style-asian="normal" style:font-name-complex="Calibri1"/>
    </style:style>
    <style:style style:name="T27" style:family="text">
      <style:text-properties text:display="true"/>
    </style:style>
    <style:style style:name="T28" style:family="text">
      <style:text-properties fo:color="#0000ff" loext:opacity="100%" style:text-underline-style="solid" style:text-underline-width="auto" style:text-underline-color="font-color"/>
    </style:style>
    <style:style style:name="T29" style:family="text">
      <style:text-properties fo:color="#e36c0a" loext:opacity="100%" style:font-name="Calibri" style:text-underline-style="solid" style:text-underline-width="auto" style:text-underline-color="font-color" style:font-name-complex="Calibri1"/>
    </style:style>
    <style:style style:name="T30" style:family="text">
      <style:text-properties fo:color="#e36c0a" loext:opacity="100%" style:font-name="Calibri" fo:letter-spacing="-0.0071in" style:text-underline-style="solid" style:text-underline-width="auto" style:text-underline-color="font-color" style:font-name-complex="Calibri1"/>
    </style:style>
    <style:style style:name="T31" style:family="text">
      <style:text-properties fo:color="#e36c0a" loext:opacity="100%" style:font-name="Calibri" fo:letter-spacing="-0.0075in" style:text-underline-style="solid" style:text-underline-width="auto" style:text-underline-color="font-color" style:font-name-complex="Calibri1"/>
    </style:style>
    <style:style style:name="T32" style:family="text">
      <style:text-properties fo:color="#e36c0a" loext:opacity="100%" style:font-name="Calibri" fo:letter-spacing="-0.0055in" style:text-underline-style="solid" style:text-underline-width="auto" style:text-underline-color="font-color" style:font-name-complex="Calibri1"/>
    </style:style>
    <style:style style:name="T33" style:family="text">
      <style:text-properties fo:color="#222222" loext:opacity="100%" style:font-name="Calibri" fo:background-color="#ffffff" loext:char-shading-value="0" style:font-name-complex="Calibri1"/>
    </style:style>
    <style:style style:name="T34" style:family="text">
      <style:text-properties fo:color="#222222" loext:opacity="100%" style:font-name="Calibri" style:font-name-complex="Calibri1"/>
    </style:style>
    <style:style style:name="T35" style:family="text">
      <style:text-properties fo:color="#222222" loext:opacity="100%" style:font-name="Calibri" fo:font-size="12pt" fo:background-color="#ffffff" loext:char-shading-value="0" style:font-size-asian="12pt" style:font-name-complex="Calibri1" style:font-size-complex="12pt"/>
    </style:style>
    <style:style style:name="T36" style:family="text">
      <style:text-properties fo:color="#222222" loext:opacity="100%" style:font-name="Calibri" fo:font-size="12pt" fo:background-color="#ffffff" loext:char-shading-value="0" style:font-size-asian="12pt" style:font-name-complex="Calibri1"/>
    </style:style>
    <style:style style:name="T37" style:family="text">
      <style:text-properties fo:color="#222222" loext:opacity="100%" style:font-name="Calibri" fo:font-size="12pt" style:font-size-asian="12pt" style:font-name-complex="Calibri1" style:font-size-complex="12pt"/>
    </style:style>
    <style:style style:name="T38" style:family="text">
      <style:text-properties fo:color="#222222" loext:opacity="100%" style:font-name="Calibri" fo:font-size="12pt" style:font-name-asian="Times New Roman1" style:font-size-asian="12pt" style:language-asian="fr" style:country-asian="FR" style:font-name-complex="Calibri1" style:font-size-complex="12pt"/>
    </style:style>
    <style:style style:name="T39" style:family="text">
      <style:text-properties fo:color="#222222" loext:opacity="100%" style:font-name="Calibri" fo:font-size="12pt" fo:font-weight="bold" style:font-name-asian="Times New Roman1" style:font-size-asian="12pt" style:language-asian="fr" style:country-asian="FR" style:font-weight-asian="bold" style:font-name-complex="Calibri1" style:font-size-complex="12pt" style:font-weight-complex="bold"/>
    </style:style>
    <style:style style:name="T40" style:family="text">
      <style:text-properties fo:color="#222222" loext:opacity="100%" style:font-name="Calibri" fo:font-size="12pt" fo:font-weight="bold" fo:background-color="#ffffff" loext:char-shading-value="0" style:font-size-asian="12pt" style:font-weight-asian="bold" style:font-name-complex="Calibri1"/>
    </style:style>
    <style:style style:name="T41" style:family="text">
      <style:text-properties fo:color="#222222" loext:opacity="100%" style:font-name="Calibri" fo:font-size="12pt" fo:font-weight="normal" fo:background-color="#ffffff" loext:char-shading-value="0" style:font-size-asian="12pt" style:font-weight-asian="normal" style:font-name-complex="Calibri1"/>
    </style:style>
    <style:style style:name="T42" style:family="text">
      <style:text-properties fo:color="#222222" loext:opacity="100%" style:font-name="Calibri" fo:font-size="11pt" fo:background-color="#ffffff" loext:char-shading-value="0" style:font-size-asian="11pt" style:font-name-complex="Calibri1"/>
    </style:style>
    <style:style style:name="T43" style:family="text">
      <style:text-properties fo:color="#222222" loext:opacity="100%" style:font-name="Calibri" fo:font-weight="normal" style:font-weight-asian="normal" style:font-name-complex="Calibri1"/>
    </style:style>
    <style:style style:name="T44" style:family="text">
      <style:text-properties fo:color="#222222" loext:opacity="100%" style:font-name="Calibri" fo:font-weight="bold" style:font-weight-asian="bold" style:font-name-complex="Calibri1"/>
    </style:style>
    <style:style style:name="T45" style:family="text">
      <style:text-properties fo:color="#222222" loext:opacity="100%" style:font-name="Calibri" fo:font-size="14pt" fo:background-color="#ffffff" loext:char-shading-value="0" style:font-size-asian="14pt" style:font-name-complex="Calibri1"/>
    </style:style>
    <style:style style:name="T46" style:family="text">
      <style:text-properties fo:color="#000000" loext:opacity="100%" style:font-name="Calibri" fo:font-size="13pt" fo:font-weight="bold" style:font-size-asian="13pt" style:font-weight-asian="bold" style:font-name-complex="Calibri1" style:font-size-complex="13pt" style:font-weight-complex="bold"/>
    </style:style>
    <style:style style:name="T47" style:family="text">
      <style:text-properties fo:color="#000000" loext:opacity="100%" style:font-name="Calibri" fo:font-size="12pt" style:font-name-asian="Times New Roman1" style:font-size-asian="12pt" style:language-asian="fr" style:country-asian="FR" style:font-name-complex="Calibri1" style:font-size-complex="12pt"/>
    </style:style>
    <style:style style:name="T48" style:family="text">
      <style:text-properties fo:color="#000000" loext:opacity="100%" style:font-name="Arial" fo:font-weight="bold" style:font-weight-asian="bold" style:font-name-complex="Arial1" style:font-weight-complex="bold"/>
    </style:style>
    <style:style style:name="T49" style:family="text">
      <style:text-properties fo:font-size="12pt" style:font-size-asian="12pt"/>
    </style:style>
    <style:style style:name="T50" style:family="text">
      <style:text-properties fo:font-size="12pt" fo:font-weight="bold" style:font-size-asian="12pt" style:font-weight-asian="bold" style:font-size-complex="12pt" style:font-weight-complex="bold"/>
    </style:style>
    <style:style style:name="T51" style:family="text">
      <style:text-properties fo:color="#f79646" loext:opacity="100%" style:font-name="Calibri" style:text-underline-style="solid" style:text-underline-width="auto" style:text-underline-color="font-color" style:font-name-complex="Calibri1"/>
    </style:style>
    <style:style style:name="T52" style:family="text">
      <style:text-properties fo:color="#f79646" loext:opacity="100%" style:font-name="Calibri" fo:font-size="11pt" style:font-size-asian="11pt" style:font-name-complex="Calibri1"/>
    </style:style>
    <style:style style:name="T53" style:family="text">
      <style:text-properties fo:color="#f79646" loext:opacity="100%" style:font-name="Calibri" style:font-name-complex="Calibri1"/>
    </style:style>
    <style:style style:name="T54" style:family="text">
      <style:text-properties fo:color="#f79646" loext:opacity="100%" style:font-name="Calibri" fo:font-size="14pt" style:font-size-asian="14pt" style:font-name-complex="Calibri1"/>
    </style:style>
    <style:style style:name="T55" style:family="text">
      <style:text-properties fo:color="#f79646" loext:opacity="100%" style:font-name="Calibri" fo:font-size="12pt" style:font-size-asian="12pt" style:font-name-complex="Calibri1"/>
    </style:style>
    <style:style style:name="T56" style:family="text">
      <style:text-properties fo:color="#f79646" loext:opacity="100%" style:font-name="Calibri" fo:font-size="20pt" style:font-name-asian="Calibri Light1" style:font-size-asian="20pt" style:font-name-complex="Calibri1" style:font-size-complex="16pt"/>
    </style:style>
    <style:style style:name="T57" style:family="text">
      <style:text-properties fo:color="#f79646" loext:opacity="100%" style:font-name="Calibri" fo:font-size="16pt" style:font-size-asian="16pt" style:font-name-complex="Calibri1"/>
    </style:style>
    <style:style style:name="T58" style:family="text">
      <style:text-properties fo:color="#f79646" loext:opacity="100%" style:font-name="Calibri" fo:font-size="16pt" style:font-size-asian="16pt" style:font-name-complex="Calibri1" style:font-size-complex="16pt"/>
    </style:style>
    <style:style style:name="T59" style:family="text">
      <style:text-properties fo:color="#f79646" loext:opacity="100%" style:text-position="super 58%" style:font-name="Calibri" fo:font-size="16pt" style:font-size-asian="16pt" style:font-name-complex="Calibri1"/>
    </style:style>
    <style:style style:name="T60" style:family="text">
      <style:text-properties fo:color="#0e0e0e" loext:opacity="100%" style:font-name="Calibri" fo:font-size="12pt" style:font-name-asian="Times New Roman1" style:font-size-asian="12pt" style:language-asian="fr" style:country-asian="FR" style:font-name-complex="Calibri1" style:font-size-complex="12pt" style:font-weight-complex="bold"/>
    </style:style>
    <style:style style:name="T61" style:family="text">
      <style:text-properties fo:color="#0e0e0e" loext:opacity="100%" style:font-name="Calibri" fo:font-size="12pt" style:font-name-asian="Times New Roman1" style:font-size-asian="12pt" style:language-asian="fr" style:country-asian="FR" style:font-name-complex="Calibri1" style:font-size-complex="12pt"/>
    </style:style>
    <style:style style:name="T62" style:family="text">
      <style:text-properties fo:color="#0e0e0e" loext:opacity="100%" style:font-name="Calibri" fo:font-size="12pt" fo:language="en" fo:country="US" style:font-name-asian="Times New Roman1" style:font-size-asian="12pt" style:language-asian="fr" style:country-asian="FR" style:font-name-complex="Calibri1" style:font-size-complex="12pt" style:font-weight-complex="bold"/>
    </style:style>
    <style:style style:name="T63" style:family="text">
      <style:text-properties fo:color="#0e0e0e" loext:opacity="100%" style:font-name="Calibri" fo:font-size="12pt" fo:language="en" fo:country="US" style:font-name-asian="Times New Roman1" style:font-size-asian="12pt" style:language-asian="fr" style:country-asian="FR" style:font-name-complex="Calibri1" style:font-size-complex="12pt"/>
    </style:style>
    <style:style style:name="T64" style:family="text">
      <style:text-properties fo:color="#0e0e0e" loext:opacity="100%" style:font-name="Calibri" fo:font-size="12pt" fo:font-weight="bold" style:font-name-asian="Times New Roman1" style:font-size-asian="12pt" style:language-asian="fr" style:country-asian="FR" style:font-weight-asian="bold" style:font-name-complex="Calibri1" style:font-size-complex="12pt" style:font-weight-complex="bold"/>
    </style:style>
    <style:style style:name="T65" style:family="text">
      <style:text-properties fo:font-weight="bold" style:font-weight-asian="bold" style:font-weight-complex="bold"/>
    </style:style>
    <style:style style:name="T66" style:family="text">
      <style:text-properties style:font-weight-complex="bold"/>
    </style:style>
    <style:style style:name="T67" style:family="text">
      <style:text-properties fo:color="#1f497d" loext:opacity="100%" fo:font-size="9pt" fo:font-style="italic" style:font-size-asian="9pt" style:font-style-asian="italic"/>
    </style:style>
    <style:style style:name="fr1"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in" fo:margin-bottom="0in"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6819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in" fo:border="none" style:mirror="none" fo:clip="rect(0.0854in, 1.9429in, 1.1752in, 0.0035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1252in" fo:margin-top="0in" fo:margin-bottom="0in" style:wrap="none" style:vertical-pos="from-top" style:vertical-rel="paragraph" style:horizontal-pos="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Frame">
      <style:graphic-properties draw:stroke="solid" svg:stroke-width="0.0102in" svg:stroke-color="#ffffff" draw:stroke-linejoin="miter" draw:fill="solid" draw:fill-color="#ffffff" draw:textarea-vertical-align="top" draw:auto-grow-height="true" fo:min-height="0in" fo:min-width="0in" fo:padding-top="0.05in" fo:padding-bottom="0.05in" fo:padding-left="0.1in" fo:padding-right="0.1in" fo:wrap-option="wrap" fo:margin-left="0.1252in" fo:margin-right="0.1528in" fo:margin-top="0.05in" fo:margin-bottom="0.0701in" style:run-through="foreground" style:wrap="parallel" style:number-wrapped-paragraphs="no-limit" style:wrap-contour="false" style:vertical-pos="from-top" style:vertical-rel="paragraph" style:horizontal-pos="from-left" style:horizontal-rel="page-content" draw:wrap-influence-on-position="once-concurrent" loext:allow-overlap="true" style:flow-with-text="false" loext:rel-height-rel="paragraph"/>
    </style:style>
    <style:style style:name="gr2" style:family="graphic" style:parent-style-name="Frame">
      <style:graphic-properties draw:stroke="none" svg:stroke-width="0.0102in" draw:stroke-linejoin="miter" draw:fill="solid" draw:fill-color="#ffffff" draw:textarea-vertical-align="top" draw:auto-grow-height="true" fo:min-height="0in" fo:min-width="0in" fo:padding-top="0.05in" fo:padding-bottom="0.05in" fo:padding-left="0.1in" fo:padding-right="0.1in" fo:wrap-option="wrap" fo:margin-left="0.1252in" fo:margin-right="0.1252in" fo:margin-top="0.05in" fo:margin-bottom="0.0583in" style:run-through="foreground" style:wrap="parallel" style:number-wrapped-paragraphs="no-limit" style:wrap-contour="false" style:vertical-pos="from-top" style:vertical-rel="paragraph" style:horizontal-pos="from-left" style:horizontal-rel="page-content" draw:wrap-influence-on-position="once-concurrent" loext:allow-overlap="true" style:flow-with-text="false" loext:rel-width-rel="paragraph" loext:rel-height-rel="paragraph"/>
    </style:style>
    <style:style style:name="gr3" style:family="graphic" style:parent-style-name="Frame">
      <style:graphic-properties draw:stroke="none" svg:stroke-width="0.0102in" draw:stroke-linejoin="miter" draw:fill="solid" draw:fill-color="#ffffff" draw:textarea-vertical-align="top" draw:auto-grow-height="false" fo:min-height="0.152in" fo:min-width="0.3307in" fo:padding-top="0.05in" fo:padding-bottom="0.05in" fo:padding-left="0.1in" fo:padding-right="0.1in" fo:wrap-option="wrap" fo:margin-left="0.1252in" fo:margin-right="0.1252in" fo:margin-top="0.05in" fo:margin-bottom="0.05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none" svg:stroke-width="0.0102in" draw:stroke-linejoin="miter" draw:fill="solid" draw:fill-color="#ffffff" draw:textarea-vertical-align="top" draw:auto-grow-height="false" fo:min-height="0.1638in" fo:min-width="0.3008in" fo:padding-top="0.05in" fo:padding-bottom="0.05in" fo:padding-left="0.1in" fo:padding-right="0.1in" fo:wrap-option="wrap" fo:margin-left="0.1252in" fo:margin-right="0.1252in" fo:margin-top="0.05in" fo:margin-bottom="0.0575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none" svg:stroke-width="0in" draw:fill="solid" draw:fill-color="#ffffff" draw:textarea-vertical-align="top" draw:auto-grow-height="true" fo:min-height="0in" fo:min-width="0in" fo:padding-top="0in" fo:padding-bottom="0in" fo:padding-left="0in" fo:padding-right="0in" fo:wrap-option="wrap" fo:margin-left="0.1252in" fo:margin-right="0.1252in" fo:margin-top="0in" fo:margin-bottom="0in" style:run-through="foreground" style:wrap="parallel" style:number-wrapped-paragraphs="no-limit" style:wrap-contour="true" style:wrap-contour-mode="full" style:vertical-pos="from-top" style:vertical-rel="paragraph" style:horizontal-pos="from-left" style:horizontal-rel="page-content" draw:wrap-influence-on-position="once-concurrent" loext:allow-overlap="true" style:flow-with-text="false"/>
    </style:style>
    <style:style style:name="gr6" style:family="graphic">
      <style:graphic-properties draw:stroke="solid" svg:stroke-width="0.0417in" svg:stroke-color="#000000" svg:stroke-linecap="butt" draw:fill="none" draw:textarea-horizontal-align="center" draw:textarea-vertical-align="top" draw:auto-grow-height="false" fo:padding-top="0.0492in" fo:padding-bottom="0.0492in" fo:padding-left="0.0984in" fo:padding-right="0.0984in" fo:wrap-option="wrap" draw:shadow="visible" draw:shadow-offset-x="0in" draw:shadow-offset-y="0.0252in" draw:shadow-color="#000000" draw:shadow-opacity="35%" loext:shadow-blur="0.0437in"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stroke="none" svg:stroke-width="0in" draw:fill="solid" draw:fill-color="#ffffff" draw:textarea-vertical-align="top" draw:auto-grow-height="true" fo:min-height="0in" fo:min-width="0in" fo:padding-top="0in" fo:padding-bottom="0in" fo:padding-left="0in" fo:padding-right="0in" fo:wrap-option="wrap" fo:margin-left="0.1252in" fo:margin-right="0.1252in" fo:margin-top="0in" fo:margin-bottom="0in"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8" style:family="graphic" style:parent-style-name="Frame">
      <style:graphic-properties draw:stroke="none" svg:stroke-width="0in" draw:fill="solid" draw:fill-color="#ffffff" draw:textarea-vertical-align="top" draw:auto-grow-height="false" fo:min-height="0.1827in" fo:min-width="2.5047in" fo:padding-top="0in" fo:padding-bottom="0in" fo:padding-left="0in" fo:padding-right="0in" fo:wrap-option="wrap" fo:margin-left="0.1252in" fo:margin-right="0.1252in" fo:margin-top="0in" fo:margin-bottom="0.0055in" style:run-through="foreground" style:wrap="parallel" style:number-wrapped-paragraphs="no-limit" style:wrap-contour="true" style:wrap-contour-mode="full" style:vertical-pos="from-top" style:vertical-rel="paragraph" style:horizontal-pos="center" style:horizontal-rel="page" draw:wrap-influence-on-position="once-concurrent" loext:allow-overlap="true" style:flow-with-text="false"/>
    </style:style>
    <style:style style:name="gr9" style:family="graphic" style:parent-style-name="Frame">
      <style:graphic-properties draw:stroke="none" svg:stroke-width="0in" draw:fill="solid" draw:fill-color="#ffffff" draw:textarea-vertical-align="top" draw:auto-grow-height="false" fo:min-height="0.1827in" fo:min-width="2.661in" fo:padding-top="0in" fo:padding-bottom="0in" fo:padding-left="0in" fo:padding-right="0in" fo:wrap-option="wrap" fo:margin-left="0.1252in" fo:margin-right="0.1311in" fo:margin-top="0in" fo:margin-bottom="0.0055in" style:run-through="foreground" style:wrap="parallel" style:number-wrapped-paragraphs="no-limit" style:wrap-contour="true" style:wrap-contour-mode="full" style:vertical-pos="from-top" style:vertical-rel="paragraph" style:horizontal-pos="from-left" style:horizontal-rel="page-content" draw:wrap-influence-on-position="once-concurrent" loext:allow-overlap="true" style:flow-with-text="false"/>
    </style:style>
    <style:style style:name="gr10" style:family="graphic" style:parent-style-name="Frame">
      <style:graphic-properties draw:stroke="none" svg:stroke-width="0.0102in" draw:stroke-linejoin="miter" draw:fill="solid" draw:fill-color="#ffffff" draw:textarea-vertical-align="top" draw:auto-grow-height="false" fo:min-height="0.8866in" fo:min-width="2.8902in" fo:padding-top="0.05in" fo:padding-bottom="0.05in" fo:padding-left="0.1in" fo:padding-right="0.1in" fo:wrap-option="wrap" fo:margin-left="0.1252in" fo:margin-right="0.1252in" fo:margin-top="0.05in" fo:margin-bottom="0.05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loext:rel-width-rel="paragraph"/>
    </style:style>
    <style:style style:name="gr11" style:family="graphic" style:parent-style-name="Frame">
      <style:graphic-properties draw:stroke="none" svg:stroke-width="0.0102in" draw:stroke-linejoin="miter" draw:fill="solid" draw:fill-color="#ffffff" draw:textarea-vertical-align="top" draw:auto-grow-height="false" fo:min-height="1.2339in" fo:min-width="5.8701in" fo:padding-top="0.05in" fo:padding-bottom="0.05in" fo:padding-left="0.1in" fo:padding-right="0.1in" fo:wrap-option="wrap" fo:margin-left="0.1252in" fo:margin-right="0.1252in" fo:margin-top="0.05in" fo:margin-bottom="0.05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2" style:family="graphic" style:parent-style-name="Frame">
      <style:graphic-properties draw:stroke="none" svg:stroke-width="0in" draw:fill="solid" draw:fill-color="#ffffff" draw:textarea-vertical-align="top" draw:auto-grow-height="true" fo:min-height="0in" fo:min-width="0in" fo:padding-top="0in" fo:padding-bottom="0in" fo:padding-left="0in" fo:padding-right="0in" fo:wrap-option="wrap" fo:margin-left="0.1252in" fo:margin-right="0.1319in" fo:margin-top="0in" fo:margin-bottom="0in"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13" style:family="graphic" style:parent-style-name="Frame">
      <style:graphic-properties draw:stroke="solid" svg:stroke-width="0.0102in" svg:stroke-color="#ffffff" draw:stroke-linejoin="miter" draw:fill="solid" draw:fill-color="#ffffff" draw:textarea-vertical-align="top" draw:auto-grow-height="true" fo:min-height="0in" fo:min-width="0in" fo:padding-top="0.05in" fo:padding-bottom="0.05in" fo:padding-left="0.1in" fo:padding-right="0.1in" fo:wrap-option="wrap" fo:margin-left="0.1252in" fo:margin-right="0.1457in" fo:margin-top="0.05in" fo:margin-bottom="0.0701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loext:rel-height-rel="paragraph"/>
    </style:style>
    <style:style style:name="gr14" style:family="graphic" style:parent-style-name="Frame">
      <style:graphic-properties draw:stroke="solid" svg:stroke-width="0.0102in" svg:stroke-color="#ffffff" draw:stroke-linejoin="miter" draw:fill="solid" draw:fill-color="#ffffff" draw:textarea-vertical-align="top" draw:auto-grow-height="false" fo:min-height="0.222in" fo:min-width="3.7661in" fo:padding-top="0.05in" fo:padding-bottom="0.05in" fo:padding-left="0.1in" fo:padding-right="0.1in" fo:wrap-option="wrap" fo:margin-left="0.1252in" fo:margin-right="0.139in" fo:margin-top="0.05in" fo:margin-bottom="0.0618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5" style:family="graphic" style:parent-style-name="Frame">
      <style:graphic-properties draw:stroke="solid" svg:stroke-width="0.0102in" svg:stroke-color="#ffffff" draw:stroke-linejoin="miter" draw:fill="none" draw:textarea-vertical-align="top" draw:auto-grow-height="true" fo:min-height="0in" fo:min-width="0in" fo:padding-top="0.05in" fo:padding-bottom="0.05in" fo:padding-left="0.1in" fo:padding-right="0.1in" fo:wrap-option="wrap" fo:margin-left="0.1252in" fo:margin-right="0.1563in" fo:margin-top="0.05in" fo:margin-bottom="0.0752in" style:run-through="foreground" style:wrap="parallel" style:number-wrapped-paragraphs="no-limit" style:wrap-contour="false" style:vertical-pos="from-top" style:vertical-rel="paragraph" style:horizontal-pos="center" style:horizontal-rel="page" draw:wrap-influence-on-position="once-concurrent" loext:allow-overlap="true" style:flow-with-text="false" loext:rel-height-rel="paragraph"/>
    </style:style>
    <style:style style:name="gr16" style:family="graphic" style:parent-style-name="Frame">
      <style:graphic-properties draw:stroke="none" svg:stroke-width="0in" draw:fill="solid" draw:fill-color="#ffffff" draw:textarea-vertical-align="top" draw:auto-grow-height="false" fo:min-height="0.1535in" fo:min-width="2.6811in" fo:padding-top="0in" fo:padding-bottom="0in" fo:padding-left="0in" fo:padding-right="0in" fo:wrap-option="wrap" fo:margin-left="0.1252in" fo:margin-right="0.1319in" fo:margin-top="0in" fo:margin-bottom="0in" style:run-through="foreground" style:wrap="parallel" style:number-wrapped-paragraphs="no-limit" style:wrap-contour="true" style:wrap-contour-mode="full" style:vertical-pos="from-top" style:vertical-rel="paragraph" style:horizontal-pos="from-left" style:horizontal-rel="page-content" draw:wrap-influence-on-position="once-concurrent" loext:allow-overlap="true" style:flow-with-text="false"/>
    </style:style>
    <style:style style:name="gr17" style:family="graphic" style:parent-style-name="Frame">
      <style:graphic-properties draw:stroke="solid" svg:stroke-width="0.0102in" svg:stroke-color="#ffffff" draw:stroke-linejoin="miter" draw:fill="solid" draw:fill-color="#ffffff" draw:textarea-vertical-align="top" draw:auto-grow-height="true" fo:min-height="0in" fo:min-width="0in" fo:padding-top="0.05in" fo:padding-bottom="0.05in" fo:padding-left="0.1in" fo:padding-right="0.1in" fo:wrap-option="wrap" fo:margin-left="0.1252in" fo:margin-right="0.1528in" fo:margin-top="0.05in" fo:margin-bottom="0.0661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loext:rel-height-rel="paragraph"/>
    </style:style>
    <style:style style:name="gr18" style:family="graphic" style:parent-style-name="Frame">
      <style:graphic-properties draw:stroke="none" svg:stroke-width="0in" draw:fill="solid" draw:fill-color="#ffffff" draw:textarea-vertical-align="top" draw:auto-grow-height="false" fo:min-height="0.1744in" fo:min-width="1.8528in" fo:padding-top="0in" fo:padding-bottom="0in" fo:padding-left="0in" fo:padding-right="0in" fo:wrap-option="wrap" fo:margin-left="0.1252in" fo:margin-right="0.1272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9" style:family="graphic" style:parent-style-name="Frame">
      <style:graphic-properties draw:stroke="none" svg:stroke-width="0in" draw:fill="solid" draw:fill-color="#ffffff" draw:textarea-vertical-align="top" draw:auto-grow-height="true" fo:min-height="0in" fo:min-width="0in" fo:padding-top="0in" fo:padding-bottom="0in" fo:padding-left="0in" fo:padding-right="0in" fo:wrap-option="wrap" fo:margin-left="0.1252in" fo:margin-right="0.1252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0" style:family="graphic" style:parent-style-name="Frame">
      <style:graphic-properties draw:stroke="none" svg:stroke-width="0.0102in" draw:stroke-linejoin="miter" draw:fill="solid" draw:fill-color="#ffffff" draw:textarea-vertical-align="top" draw:auto-grow-height="true" fo:min-height="0in" fo:min-width="0in" fo:padding-top="0.05in" fo:padding-bottom="0.05in" fo:padding-left="0.1in" fo:padding-right="0.1in" fo:wrap-option="wrap" fo:margin-left="0.1252in" fo:margin-right="0.1319in" fo:margin-top="0.05in" fo:margin-bottom="0.05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loext:rel-height-rel="paragraph"/>
    </style:style>
    <style:style style:name="gr2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fo:margin-left="0.1252in" fo:margin-right="0.1252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2" style:family="graphic" style:parent-style-name="Frame">
      <style:graphic-properties draw:stroke="solid" svg:stroke-width="0.0102in" svg:stroke-color="#ffffff" draw:stroke-linejoin="miter" draw:fill="none" draw:textarea-vertical-align="top" draw:auto-grow-height="true" fo:min-height="0in" fo:min-width="0in" fo:padding-top="0.05in" fo:padding-bottom="0.05in" fo:padding-left="0.1in" fo:padding-right="0.1in" fo:wrap-option="wrap" fo:margin-left="0.1252in" fo:margin-right="0.1465in" fo:margin-top="0.05in" fo:margin-bottom="0.0654in" style:run-through="foreground" style:wrap="parallel" style:number-wrapped-paragraphs="no-limit" style:wrap-contour="false" style:vertical-pos="from-top" style:vertical-rel="paragraph" style:horizontal-pos="center" style:horizontal-rel="page" draw:wrap-influence-on-position="once-concurrent" loext:allow-overlap="true" style:flow-with-text="false" loext:rel-height-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80"><draw:custom-shape text:anchor-type="paragraph" style:rel-height="20%" draw:z-index="5" draw:name="Zone de texte 2" draw:style-name="gr22" draw:text-style-name="P91" svg:width="6.4157in" svg:height="1.0996in" svg:x="0.9264in" svg:y="0.0008in"><text:p text:style-name="Title"><text:span text:style-name="T1">SAE</text:span><text:span text:style-name="T2"> </text:span><text:span text:style-name="T3">1.03 Rapport</text:span></text:p><text:p text:style-name="Frame_20_contents"/><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9"/>
        <text:p text:style-name="P79"><draw:custom-shape text:anchor-type="paragraph" style:rel-height="20%" draw:z-index="22" draw:name="Zone de texte 2" draw:style-name="gr15" draw:text-style-name="P91" svg:width="7.198in" svg:height="1.5067in" svg:x="0.5346in" svg:y="0.0937in"><text:p text:style-name="Title"><text:span text:style-name="T4">Découvrir un dispositif de transmission</text:span></text:p><text:p text:style-name="Frame_20_contents"/><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9"/>
        <text:p text:style-name="P79"/>
        <text:p text:style-name="P79"/>
        <text:p text:style-name="P79"/>
        <text:p text:style-name="P79"/>
        <text:p text:style-name="P79"/>
        <text:p text:style-name="P79"/>
        <text:p text:style-name="P79"/>
        <text:p text:style-name="P79"/>
        <text:p text:style-name="P79"/>
        <text:p text:style-name="P87"/>
        <text:p text:style-name="P88"/>
        <text:p text:style-name="P54"/>
        <text:p text:style-name="P55"/>
        <text:p text:style-name="P56"/>
        <text:p text:style-name="P56"/>
        <text:p text:style-name="P57"><text:span text:style-name="T6">2024</text:span></text:p>
        <text:p text:style-name="P41"/>
        <text:p text:style-name="P40"/>
        <text:table-of-content text:style-name="Sect1" text:protected="true" text:name="Table of Contents1">
          <text:table-of-content-source text:outline-level="3" text:use-index-marks="fals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78">Table des matières</text:p>
            </text:index-title>
            <text:p text:style-name="P8"/>
          </text:index-body>
        </text:table-of-content>
        <text:p text:style-name="P9"><text:a xlink:type="simple" xlink:href="#_Toc185198800" text:style-name="Index_20_Link" text:visited-style-name="Index_20_Link"><text:span text:style-name="T19">I.</text:span></text:a><text:a xlink:type="simple" xlink:href="#_Toc185198800" text:style-name="Index_20_Link" text:visited-style-name="Index_20_Link"><text:span text:style-name="T9"><text:tab/></text:span></text:a><text:a xlink:type="simple" xlink:href="#_Toc185198800" text:style-name="Index_20_Link" text:visited-style-name="Index_20_Link"><text:span text:style-name="T19">Le</text:span></text:a><text:a xlink:type="simple" xlink:href="#_Toc185198800" text:style-name="Index_20_Link" text:visited-style-name="Index_20_Link"><text:span text:style-name="T20"> </text:span></text:a><text:a xlink:type="simple" xlink:href="#_Toc185198800" text:style-name="Index_20_Link" text:visited-style-name="Index_20_Link"><text:span text:style-name="T19">câblage</text:span></text:a><text:a xlink:type="simple" xlink:href="#_Toc185198800" text:style-name="Index_20_Link" text:visited-style-name="Index_20_Link"><text:span text:style-name="T21"> </text:span></text:a><text:a xlink:type="simple" xlink:href="#_Toc185198800" text:style-name="Index_20_Link" text:visited-style-name="Index_20_Link"><text:span text:style-name="T19">de</text:span></text:a><text:a xlink:type="simple" xlink:href="#_Toc185198800" text:style-name="Index_20_Link" text:visited-style-name="Index_20_Link"><text:span text:style-name="T21"> </text:span></text:a><text:a xlink:type="simple" xlink:href="#_Toc185198800" text:style-name="Index_20_Link" text:visited-style-name="Index_20_Link"><text:span text:style-name="T19">notre</text:span></text:a><text:a xlink:type="simple" xlink:href="#_Toc185198800" text:style-name="Index_20_Link" text:visited-style-name="Index_20_Link"><text:span text:style-name="T20"> </text:span></text:a><text:a xlink:type="simple" xlink:href="#_Toc185198800" text:style-name="Index_20_Link" text:visited-style-name="Index_20_Link"><text:span text:style-name="T19">installation</text:span></text:a><text:a xlink:type="simple" xlink:href="#_Toc185198800" text:style-name="Index_20_Link" text:visited-style-name="Index_20_Link"><text:span text:style-name="T22"> </text:span></text:a><text:a xlink:type="simple" xlink:href="#_Toc185198800" text:style-name="Index_20_Link" text:visited-style-name="Index_20_Link"><text:span text:style-name="T20">:</text:span></text:a><text:a xlink:type="simple" xlink:href="#_Toc185198800" text:style-name="Index_20_Link" text:visited-style-name="Index_20_Link"><text:span text:style-name="T27"><text:tab/>3</text:span></text:a></text:p>
        <text:p text:style-name="P9"><text:a xlink:type="simple" xlink:href="#_Toc185198808" text:style-name="Index_20_Link" text:visited-style-name="Index_20_Link"><text:span text:style-name="T19">II.</text:span></text:a><text:a xlink:type="simple" xlink:href="#_Toc185198808" text:style-name="Index_20_Link" text:visited-style-name="Index_20_Link"><text:span text:style-name="T9"><text:tab/></text:span></text:a><text:a xlink:type="simple" xlink:href="#_Toc185198808" text:style-name="Index_20_Link" text:visited-style-name="Index_20_Link"><text:span text:style-name="T19">Mesures du PoE du switch</text:span></text:a><text:a xlink:type="simple" xlink:href="#_Toc185198808" text:style-name="Index_20_Link" text:visited-style-name="Index_20_Link"><text:span text:style-name="T27"><text:tab/>4</text:span></text:a></text:p>
        <text:p text:style-name="P9"><text:a xlink:type="simple" xlink:href="#_Toc185198809" text:style-name="Index_20_Link" text:visited-style-name="Index_20_Link"><text:span text:style-name="T19">III.</text:span></text:a><text:a xlink:type="simple" xlink:href="#_Toc185198809" text:style-name="Index_20_Link" text:visited-style-name="Index_20_Link"><text:span text:style-name="T9"><text:tab/></text:span></text:a><text:a xlink:type="simple" xlink:href="#_Toc185198809" text:style-name="Index_20_Link" text:visited-style-name="Index_20_Link"><text:span text:style-name="T19">Mesures de puissance de notre Réseau</text:span></text:a><text:a xlink:type="simple" xlink:href="#_Toc185198809" text:style-name="Index_20_Link" text:visited-style-name="Index_20_Link"><text:span text:style-name="T27"><text:tab/>5</text:span></text:a></text:p>
        <text:p text:style-name="P9"><text:a xlink:type="simple" xlink:href="#_Toc185198811" text:style-name="Index_20_Link" text:visited-style-name="Index_20_Link"><text:span text:style-name="T19">1.</text:span></text:a><text:a xlink:type="simple" xlink:href="#_Toc185198811" text:style-name="Index_20_Link" text:visited-style-name="Index_20_Link"><text:span text:style-name="T9"><text:tab/></text:span></text:a><text:a xlink:type="simple" xlink:href="#_Toc185198811" text:style-name="Index_20_Link" text:visited-style-name="Index_20_Link"><text:span text:style-name="T19">Le Réseau 802.11Gg</text:span></text:a><text:a xlink:type="simple" xlink:href="#_Toc185198811" text:style-name="Index_20_Link" text:visited-style-name="Index_20_Link"><text:span text:style-name="T27"><text:tab/>5</text:span></text:a></text:p>
        <text:p text:style-name="P9"><text:a xlink:type="simple" xlink:href="#_Toc185198812" text:style-name="Index_20_Link" text:visited-style-name="Index_20_Link"><text:span text:style-name="T19">a)</text:span></text:a><text:a xlink:type="simple" xlink:href="#_Toc185198812" text:style-name="Index_20_Link" text:visited-style-name="Index_20_Link"><text:span text:style-name="T9"><text:tab/></text:span></text:a><text:a xlink:type="simple" xlink:href="#_Toc185198812" text:style-name="Index_20_Link" text:visited-style-name="Index_20_Link"><text:span text:style-name="T19">Diagramme de réception</text:span></text:a><text:a xlink:type="simple" xlink:href="#_Toc185198812" text:style-name="Index_20_Link" text:visited-style-name="Index_20_Link"><text:span text:style-name="T27"><text:tab/>5</text:span></text:a></text:p>
        <text:p text:style-name="P9"><text:a xlink:type="simple" xlink:href="#_Toc185198815" text:style-name="Index_20_Link" text:visited-style-name="Index_20_Link"><text:span text:style-name="T19">2.</text:span></text:a><text:a xlink:type="simple" xlink:href="#_Toc185198815" text:style-name="Index_20_Link" text:visited-style-name="Index_20_Link"><text:span text:style-name="T9"><text:tab/></text:span></text:a><text:a xlink:type="simple" xlink:href="#_Toc185198815" text:style-name="Index_20_Link" text:visited-style-name="Index_20_Link"><text:span text:style-name="T19">Le Réseau 802.11a</text:span></text:a><text:a xlink:type="simple" xlink:href="#_Toc185198815" text:style-name="Index_20_Link" text:visited-style-name="Index_20_Link"><text:span text:style-name="T27"><text:tab/>6</text:span></text:a></text:p>
        <text:p text:style-name="P9"><text:a xlink:type="simple" xlink:href="#_Toc185198816" text:style-name="Index_20_Link" text:visited-style-name="Index_20_Link"><text:span text:style-name="T19">a)</text:span></text:a><text:a xlink:type="simple" xlink:href="#_Toc185198816" text:style-name="Index_20_Link" text:visited-style-name="Index_20_Link"><text:span text:style-name="T9"><text:tab/></text:span></text:a><text:a xlink:type="simple" xlink:href="#_Toc185198816" text:style-name="Index_20_Link" text:visited-style-name="Index_20_Link"><text:span text:style-name="T19">Diagramme de réception</text:span></text:a><text:a xlink:type="simple" xlink:href="#_Toc185198816" text:style-name="Index_20_Link" text:visited-style-name="Index_20_Link"><text:span text:style-name="T27"><text:tab/>6</text:span></text:a></text:p>
        <text:p text:style-name="P9"><text:span text:style-name="T23">I</text:span><text:a xlink:type="simple" xlink:href="#_Toc185198819" text:style-name="Index_20_Link" text:visited-style-name="Index_20_Link"><text:span text:style-name="T19">V.</text:span></text:a><text:a xlink:type="simple" xlink:href="#_Toc185198819" text:style-name="Index_20_Link" text:visited-style-name="Index_20_Link"><text:span text:style-name="T9"><text:tab/></text:span></text:a><text:a xlink:type="simple" xlink:href="#_Toc185198819" text:style-name="Index_20_Link" text:visited-style-name="Index_20_Link"><text:span text:style-name="T19">Heatmap du Réseau GRA en 802.11g et 802.11a</text:span></text:a><text:a xlink:type="simple" xlink:href="#_Toc185198819" text:style-name="Index_20_Link" text:visited-style-name="Index_20_Link"><text:span text:style-name="T27"><text:tab/>7</text:span></text:a></text:p>
        <text:p text:style-name="P9"><text:a xlink:type="simple" xlink:href="#_Toc185198820" text:style-name="Index_20_Link" text:visited-style-name="Index_20_Link"><text:span text:style-name="T19">1.</text:span></text:a><text:a xlink:type="simple" xlink:href="#_Toc185198820" text:style-name="Index_20_Link" text:visited-style-name="Index_20_Link"><text:span text:style-name="T9"><text:tab/></text:span></text:a><text:a xlink:type="simple" xlink:href="#_Toc185198820" text:style-name="Index_20_Link" text:visited-style-name="Index_20_Link"><text:span text:style-name="T19">En 802.11g</text:span></text:a><text:a xlink:type="simple" xlink:href="#_Toc185198820" text:style-name="Index_20_Link" text:visited-style-name="Index_20_Link"><text:span text:style-name="T27"><text:tab/>7</text:span></text:a></text:p>
        <text:p text:style-name="P9"><text:a xlink:type="simple" xlink:href="#_Toc185198823" text:style-name="Index_20_Link" text:visited-style-name="Index_20_Link"><text:span text:style-name="T19">2.</text:span></text:a><text:a xlink:type="simple" xlink:href="#_Toc185198823" text:style-name="Index_20_Link" text:visited-style-name="Index_20_Link"><text:span text:style-name="T9"><text:tab/></text:span></text:a><text:a xlink:type="simple" xlink:href="#_Toc185198823" text:style-name="Index_20_Link" text:visited-style-name="Index_20_Link"><text:span text:style-name="T19">En 802.11a</text:span></text:a><text:a xlink:type="simple" xlink:href="#_Toc185198823" text:style-name="Index_20_Link" text:visited-style-name="Index_20_Link"><text:span text:style-name="T27"><text:tab/>7</text:span></text:a></text:p>
        <text:p text:style-name="P9"><text:a xlink:type="simple" xlink:href="#_Toc185198824" text:style-name="Index_20_Link" text:visited-style-name="Index_20_Link"><text:span text:style-name="T19">V.</text:span></text:a><text:a xlink:type="simple" xlink:href="#_Toc185198824" text:style-name="Index_20_Link" text:visited-style-name="Index_20_Link"><text:span text:style-name="T9"><text:tab/></text:span></text:a><text:a xlink:type="simple" xlink:href="#_Toc185198824" text:style-name="Index_20_Link" text:visited-style-name="Index_20_Link"><text:span text:style-name="T19">Débits Descendants : Réception et Distance en 802.11g et 802.11a</text:span></text:a><text:a xlink:type="simple" xlink:href="#_Toc185198824" text:style-name="Index_20_Link" text:visited-style-name="Index_20_Link"><text:span text:style-name="T27"><text:tab/>8</text:span></text:a></text:p>
        <text:p text:style-name="P9"><text:a xlink:type="simple" xlink:href="#_Toc185198825" text:style-name="Index_20_Link" text:visited-style-name="Index_20_Link"><text:span text:style-name="T19">a)</text:span></text:a><text:a xlink:type="simple" xlink:href="#_Toc185198825" text:style-name="Index_20_Link" text:visited-style-name="Index_20_Link"><text:span text:style-name="T9"><text:tab/></text:span></text:a><text:a xlink:type="simple" xlink:href="#_Toc185198825" text:style-name="Index_20_Link" text:visited-style-name="Index_20_Link"><text:span text:style-name="T19">En 802.11g</text:span></text:a><text:a xlink:type="simple" xlink:href="#_Toc185198825" text:style-name="Index_20_Link" text:visited-style-name="Index_20_Link"><text:span text:style-name="T27"><text:tab/>8</text:span></text:a></text:p>
        <text:p text:style-name="P9"><text:a xlink:type="simple" xlink:href="#_Toc185198828" text:style-name="Index_20_Link" text:visited-style-name="Index_20_Link"><text:span text:style-name="T19">b)</text:span></text:a><text:a xlink:type="simple" xlink:href="#_Toc185198828" text:style-name="Index_20_Link" text:visited-style-name="Index_20_Link"><text:span text:style-name="T9"><text:tab/></text:span></text:a><text:a xlink:type="simple" xlink:href="#_Toc185198828" text:style-name="Index_20_Link" text:visited-style-name="Index_20_Link"><text:span text:style-name="T19">En 802.11a</text:span></text:a><text:a xlink:type="simple" xlink:href="#_Toc185198828" text:style-name="Index_20_Link" text:visited-style-name="Index_20_Link"><text:span text:style-name="T27"><text:tab/>8</text:span></text:a></text:p>
        <text:p text:style-name="P9"><text:a xlink:type="simple" xlink:href="#_Toc185198830" text:style-name="Index_20_Link" text:visited-style-name="Index_20_Link"><text:span text:style-name="T19">VI.</text:span></text:a><text:a xlink:type="simple" xlink:href="#_Toc185198830" text:style-name="Index_20_Link" text:visited-style-name="Index_20_Link"><text:span text:style-name="T9"><text:tab/></text:span></text:a><text:a xlink:type="simple" xlink:href="#_Toc185198830" text:style-name="Index_20_Link" text:visited-style-name="Index_20_Link"><text:span text:style-name="T19">Informations remontées par le contrôleur en relation avec les informations réseau</text:span></text:a><text:a xlink:type="simple" xlink:href="#_Toc185198830" text:style-name="Index_20_Link" text:visited-style-name="Index_20_Link"><text:span text:style-name="T27"><text:tab/>9</text:span></text:a></text:p>
        <text:p text:style-name="P9"><text:span text:style-name="T23">VII. <text:tab/>Simulation Packet Tracer…………………………..………………………………………………………………………………………………………………..10</text:span></text:p>
        <text:p text:style-name="P9"><text:a xlink:type="simple" xlink:href="#_Toc185198831" text:style-name="Index_20_Link" text:visited-style-name="Index_20_Link"><text:span text:style-name="T19">VIII.</text:span></text:a><text:a xlink:type="simple" xlink:href="#_Toc185198831" text:style-name="Index_20_Link" text:visited-style-name="Index_20_Link"><text:span text:style-name="T9"><text:tab/></text:span></text:a><text:a xlink:type="simple" xlink:href="#_Toc185198831" text:style-name="Index_20_Link" text:visited-style-name="Index_20_Link"><text:span text:style-name="T19">Heatmaps du Réseau uha</text:span></text:a><text:a xlink:type="simple" xlink:href="#_Toc185198831" text:style-name="Index_20_Link" text:visited-style-name="Index_20_Link"><text:span text:style-name="T27"><text:tab/>12</text:span></text:a></text:p>
        <text:p text:style-name="P9"><text:span text:style-name="T23">IX. <text:tab/>Remerciement………………………………………………………………………………………………………………………………….…………………………14</text:span></text:p>
        <text:p text:style-name="P9"><text:span text:style-name="T23">X.<text:tab/>Temps de travail estimé sur le projet………………….....…………………………………..………………………………………………………………14</text:span></text:p>
        <text:p text:style-name="P9"><text:span text:style-name="T23">XI.<text:tab/>Difficultés rencontrés…………………......…………………………………..………………………………………….…………………………………………14</text:span></text:p>
        <text:p text:style-name="P9"><text:span text:style-name="T23">XII.<text:tab/>Conclusion ………………….....…………………………………..………………………………………………………………………………………..……………14</text:span></text:p>
        <text:p text:style-name="Standard"/>
      </text:section>
      <text:p text:style-name="P81"/>
      <text:list xml:id="list2182030726" text:style-name="WWNum4">
        <text:list-item>
          <text:h text:style-name="P14" text:outline-level="1"><text:bookmark-start text:name="_Toc185182811"/><text:bookmark-start text:name="_Toc185198800"/><text:span text:style-name="T29">Le</text:span><text:span text:style-name="T30"> </text:span><text:span text:style-name="T29">câblage</text:span><text:span text:style-name="T31"> </text:span><text:span text:style-name="T29">de</text:span><text:span text:style-name="T31"> </text:span><text:span text:style-name="T29">notre</text:span><text:span text:style-name="T30"> </text:span><text:span text:style-name="T29">installation</text:span><text:span text:style-name="T32"> </text:span><text:span text:style-name="T30">:</text:span><text:bookmark-end text:name="_Toc185182811"/><text:bookmark-end text:name="_Toc185198800"/><text:span text:style-name="T29"> </text:span><text:bookmark-start text:name="_Toc185198801"/><text:bookmark-start text:name="_Toc185198234"/><text:bookmark-start text:name="_Toc185198003"/><text:bookmark-start text:name="_Toc185182920"/><text:bookmark-start text:name="_Toc185182812"/></text:h>
        </text:list-item>
      </text:list>
      <text:h text:style-name="P13" text:outline-level="1"><text:span text:style-name="T10">Lors de notre premier cours de SAE (TP encadrée) nous avons dû préparer le câblage de l’AP.</text:span><text:bookmark-end text:name="_Toc185182812"/><text:bookmark-end text:name="_Toc185182920"/><text:span text:style-name="T10">  </text:span><text:bookmark-start text:name="_Toc185182921"/><text:bookmark-start text:name="_Toc185182813"/><text:span text:style-name="T10">On a donc dû préparer le câble Mâle/Mâle et Femelle/Femelle avant de pouvoir brancher l’AP.</text:span><text:bookmark-start text:name="_Toc185198235"/><text:bookmark-start text:name="_Toc185198004"/><text:bookmark-start text:name="_Toc185182922"/><text:bookmark-start text:name="_Toc185182814"/><text:bookmark-end text:name="_Toc185182921"/><text:bookmark-end text:name="_Toc185182813"/><text:bookmark-end text:name="_Toc185198003"/><text:bookmark-end text:name="_Toc185198234"/><text:bookmark-end text:name="_Toc185198801"/></text:h>
      <text:h text:style-name="P15" text:outline-level="1"><text:span text:style-name="T12"><text:s/></text:span><text:bookmark-start text:name="_Toc185198802"/><text:span text:style-name="T12">Câble Femelle/Femelle :</text:span><text:bookmark-end text:name="_Toc185198802"/><text:bookmark-end text:name="_Toc185182814"/><text:bookmark-end text:name="_Toc185182922"/><text:bookmark-end text:name="_Toc185198004"/><text:bookmark-end text:name="_Toc185198235"/></text:h>
      <text:p text:style-name="P33"><text:span text:style-name="T33">Nous avons d’abord pris un câble RJ45, S/FTP, cat 7, que nous avons dénudé à l’aide d’une pince coupante. Ensuite, nous avons nettoyé le câble en retirant les mailles et la feuille d’aluminium de 3 paires sur 4. Puis, nous avons entouré la maille et le câble avec le bout d’aluminium pour isoler la structure et réduire les interférences. Après cela, nous avons câblé les 4 paires dans un noyau cat 6 en suivant la norme T-568A.</text:span></text:p>
      <text:p text:style-name="P35"><draw:custom-shape text:anchor-type="paragraph" draw:z-index="23" draw:name="Zone de texte 2" draw:style-name="gr14" draw:text-style-name="P90" svg:width="3.9657in" svg:height="0.3217in" svg:x="2.4126in" svg:y="0.0791in"><text:p text:style-name="P34"><text:span text:style-name="T48">La préparation du câble est donc terminée :</text:span></text:p><text:p text:style-name="Frame_20_contents"/><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Image 7" text:anchor-type="char" svg:x="2.7165in" svg:y="0.3634in" svg:width="3.0693in" svg:height="1.0362in" draw:z-index="25"><draw:image xlink:href="Pictures/10000201000002A4000000E4EC3C3C7B558DB5BA.png" xlink:type="simple" xlink:show="embed" xlink:actuate="onLoad" draw:mime-type="image/png"/><svg:desc>Une image contenant câble

Description générée automatiquement avec une confiance moyenne</svg:desc><draw:contour-polygon svg:width="3.035in" svg:height="1.024in" svg:viewBox="0 0 7709 2601" draw:points="25,0 25,2601 7734,2601 7734,0" draw:recreate-on-edit="false"/></draw:frame><draw:frame draw:style-name="fr7" draw:name="Image 1" text:anchor-type="as-char" svg:width="0.6437in" svg:height="0.9744in" draw:z-index="0"><draw:image xlink:href="Pictures/10000000000001590000020AE437DC39B73DBEC9.png" xlink:type="simple" xlink:show="embed" xlink:actuate="onLoad" draw:mime-type="image/png"/><svg:desc>Une image contenant Rectangle, capture d’écran, conception, ligne

Description générée automatiquement</svg:desc></draw:frame></text:p>
      <text:p text:style-name="P89"><draw:custom-shape text:anchor-type="paragraph" draw:z-index="25" draw:name="Zone de texte 207481596" draw:style-name="gr7" draw:text-style-name="P90" svg:width="4.4516in" svg:height="0.1516in" svg:x="2.4217in" svg:y="0.278in"><text:p text:style-name="caption">Figure 2 : Les différentes étapes de la réalisation du câble Femelle RJ45.</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start text:name="_Toc185197791"/><text:bookmark-start text:name="_Toc185201741"/><text:span text:style-name="T15">Figure </text:span><text:span text:style-name="T15"><text:sequence text:ref-name="refFigure0" text:name="Figure" text:formula="ooow:Figure+1" style:num-format="1">1</text:sequence></text:span><text:span text:style-name="T15"><text:s/>: Schéma de la norme TIA-56.</text:span><text:bookmark-end text:name="_Toc185197791"/><text:bookmark-end text:name="_Toc185201741"/></text:p>
      <text:h text:style-name="P17" text:outline-level="1"><text:bookmark-start text:name="_Toc185182819"/><text:bookmark-start text:name="_Toc185198803"/><text:bookmark-start text:name="_Toc185198005"/><text:bookmark-start text:name="_Toc185182927"/><text:span text:style-name="T12">Câble Mâle/</text:span><text:bookmark-end text:name="_Toc185182819"/><text:bookmark-end text:name="_Toc185198803"/><text:bookmark-end text:name="_Toc185198005"/><text:bookmark-end text:name="_Toc185182927"/><text:span text:style-name="T12">Mâle :</text:span></text:h>
      <text:h text:style-name="P19" text:outline-level="1"><draw:custom-shape text:anchor-type="paragraph" style:rel-height="20%" draw:z-index="32" draw:name="Zone de texte 2" draw:style-name="gr13" draw:text-style-name="P90" svg:width="3.6043in" svg:height="0.3024in" svg:x="3.6437in" svg:y="1.4827in"><text:p text:style-name="Frame_20_contents"><text:span text:style-name="T49">Voici le matériel utilisé pour réaliser ce câblage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start text:name="_Toc185182823"/><text:bookmark-start text:name="_Toc185198804"/><text:bookmark-start text:name="_Toc185198006"/><text:bookmark-start text:name="_Toc185182931"/><text:span text:style-name="T35">Les actions effectuées avec le câble S/FTP, cat 7, sont similaires à celles réalisées avec le câble RJ45, FTP, cat 6. Nous avons d’abord dénudé le câble à l’aide d’une pince coupante, nettoyé la structure en retirant les mailles et la feuille d’aluminium, puis réalisé le câblage des 4 paires dans le noyau en utilisant la norme T-568A. Enfin, nous avons procédé au sertissage avec la pince à sertir, assurant ainsi un bon contact électrique entre les fils et les broches du connecteur RJ-45</text:span><text:span text:style-name="T10">.</text:span><text:bookmark-end text:name="_Toc185182823"/><text:bookmark-end text:name="_Toc185198804"/><text:bookmark-end text:name="_Toc185198006"/><text:bookmark-end text:name="_Toc185182931"/><text:span text:style-name="T10"> </text:span><text:bookmark-start text:name="_Toc185182932"/><text:bookmark-start text:name="_Toc185182824"/><text:bookmark-start text:name="_Toc185198805"/><text:bookmark-start text:name="_Toc185198007"/><text:bookmark-start text:name="_Toc185182934"/><text:bookmark-start text:name="_Toc185182826"/></text:h>
      <text:h text:style-name="P19" text:outline-level="1"><draw:custom-shape text:anchor-type="paragraph" draw:z-index="33" draw:name="Zone de texte 207481598" draw:style-name="gr7" draw:text-style-name="P90" svg:width="3.4587in" svg:height="0.3043in" svg:x="3.9134in" svg:y="1.4909in"><text:p text:style-name="caption">Figure 4 : <text:s/>Le matériel : noyau RJ45, pince à sertir, pince à dénuder, testeur RJ45 (CableMaster 200), câble S/FTP.</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Image 5" text:anchor-type="char" svg:x="3.8665in" svg:y="0.5839in" svg:width="0.7846in" svg:height="0.7846in" draw:z-index="31"><draw:image xlink:href="Pictures/1000020100000091000000917802A5CA29FC894F.png" xlink:type="simple" xlink:show="embed" xlink:actuate="onLoad" draw:mime-type="image/png"/><svg:desc>https://lh7-rt.googleusercontent.com/docsz/AD_4nXd1P1uQBzXaNbAAvt7N6zpcz6FFJ1C8B1Ta1jP3wmKpBRa3iG2otrvO-47JpRLSgO0VyG6S0-u96DJKBIxt9odG18NsPcu9L_wFVtopDgBBFVpjl_zGzY3rSbj69RYzl-CtWWRZ3w?key=76FF-Krw-BLh9M7WPOQ3XmRz</svg:desc><draw:contour-polygon svg:width="142px" svg:height="142px" svg:viewBox="0 0 142 142" draw:points="0,0 0,142 142,142 142,0" draw:recreate-on-edit="false"/></draw:frame><draw:frame draw:style-name="fr1" draw:name="Image 4" text:anchor-type="char" svg:x="5.0862in" svg:y="0.7465in" svg:width="0.6457in" svg:height="0.6457in" draw:z-index="32"><draw:image xlink:href="Pictures/100002010000008E0000008E685607D7C99FB96C.png" xlink:type="simple" xlink:show="embed" xlink:actuate="onLoad" draw:mime-type="image/png"/><svg:desc>https://lh7-rt.googleusercontent.com/docsz/AD_4nXdNuqr2Oaqvasq-PxCsn4Ed3EoDo38r8ZKA_WkVXCVZ0JHFVB721tga_JGh1d0VbFUQwc5xMRIWCuuCpGIU2_QQUovpqxyimi9mPj2vC7V-4VX4C6UWSfWb9OlC0xmSkX52l_dhww?key=76FF-Krw-BLh9M7WPOQ3XmRz</svg:desc><draw:contour-polygon svg:width="0.6146in" svg:height="0.6343in" svg:viewBox="0 0 1561 1611" draw:points="25,0 25,1611 1586,1611 1586,0" draw:recreate-on-edit="false"/></draw:frame><draw:frame draw:style-name="fr1" draw:name="Image 6" text:anchor-type="char" svg:x="6.661in" svg:y="0.1898in" svg:width="0.7819in" svg:height="0.5835in" draw:z-index="30"><draw:image xlink:href="Pictures/10000201000000AC00000080D6B7C948FD8F73DB.png" xlink:type="simple" xlink:show="embed" xlink:actuate="onLoad" draw:mime-type="image/png"/><svg:desc>https://lh7-rt.googleusercontent.com/docsz/AD_4nXcfyIwAwRDe16AwsBXjwqzrAO51QuQmm0BpJIGUzFXnLH9pGcj_hEt0mA3mUw_TSkafToGYiDAxpB6YDxJVBTV3zJlYUgj5sH_MFlIggcc3qnovFiF1uGa5lrLkmEkiST6_Fkz46Q?key=76FF-Krw-BLh9M7WPOQ3XmRz</svg:desc><draw:contour-polygon svg:width="0.7606in" svg:height="0.5681in" svg:viewBox="0 0 1932 1443" draw:points="25,0 25,1443 1957,1443 1957,0" draw:recreate-on-edit="false"/></draw:frame><draw:frame draw:style-name="fr2" draw:name="Image2" text:anchor-type="char" svg:x="5.4638in" svg:y="0.1898in" svg:width="1.0043in" svg:height="0.7571in" draw:z-index="29"><draw:image xlink:href="Pictures/10000201000000E1000000A993CAB4EF4CB56262.png" xlink:type="simple" xlink:show="embed" xlink:actuate="onLoad" draw:mime-type="image/png"/><svg:desc>https://lh7-rt.googleusercontent.com/docsz/AD_4nXdjyFs0kpnS1JvJvLNGlNG-vJ1PO4dhVNB9oPh-4McC-JWnT0J2fpcfzIXeR3f7MoWdbdN116ySazy1qdKzyQcrygHNm6QoHxmyWp3UM_tT_NfuynxRIb1ng1n6onGC1gBHew2T4Q?key=76FF-Krw-BLh9M7WPOQ3XmRz</svg:desc><draw:contour-polygon svg:width="219px" svg:height="162px" svg:viewBox="0 0 219 162" draw:points="0,0 0,162 219,162 219,0" draw:recreate-on-edit="false"/></draw:frame><draw:frame draw:style-name="fr1" draw:name="Image 8" text:anchor-type="char" svg:x="4.5866in" svg:y="0.011in" svg:width="0.7984in" svg:height="0.7984in" draw:z-index="28"><draw:image xlink:href="Pictures/10000201000000A4000000A400D111B5D115159D.png" xlink:type="simple" xlink:show="embed" xlink:actuate="onLoad" draw:mime-type="image/png"/><svg:desc>https://lh7-rt.googleusercontent.com/docsz/AD_4nXeJ0gnyqZ_wX_DCVtk_aEy-LWQLokUxc5i1lJ2xIoStNvHpGblqsiFrekBlPPY2lBQi_AgTG3Y0NULNHapVC7BWmQh_0JnzJKtKffFA2LLzD1YugpkE7NnEM8J0CJo_pEE1BWBI0w?key=76FF-Krw-BLh9M7WPOQ3XmRz</svg:desc><draw:contour-polygon svg:width="158px" svg:height="158px" svg:viewBox="0 0 158 158" draw:points="0,0 0,158 158,158 158,0" draw:recreate-on-edit="false"/></draw:frame><draw:frame draw:style-name="fr1" draw:name="Image 9" text:anchor-type="char" svg:x="3.8181in" svg:y="0.0681in" svg:width="0.8161in" svg:height="0.611in" draw:z-index="27"><draw:image xlink:href="Pictures/10000201000000B200000085F2AB381D7CB2F9F9.png" xlink:type="simple" xlink:show="embed" xlink:actuate="onLoad" draw:mime-type="image/png"/><svg:desc>https://lh7-rt.googleusercontent.com/docsz/AD_4nXfnnXKJlfGTggbnhf8cFNksQHpDSQMvuZo5zOfw16dbOS1f81bmqtJ8aQbs3Vud3GwBCh_DFXiNK_XdsFEv3W3fhGt5yTxttNDaZ1kFOz0Ew1RSMA66Dv9RkQZir1XKdgJbMXRFMw?key=76FF-Krw-BLh9M7WPOQ3XmRz</svg:desc><draw:contour-polygon svg:width="172px" svg:height="126px" svg:viewBox="0 0 172 126" draw:points="0,0 0,126 172,126 172,0" draw:recreate-on-edit="false"/></draw:frame><draw:frame draw:style-name="fr9" draw:name="Image 3" text:anchor-type="char" svg:y="0.4374in" svg:width="3.072in" svg:height="1.2256in" draw:z-index="13"><draw:image xlink:href="Pictures/10000201000002A40000010E522596DB969251EF.png" xlink:type="simple" xlink:show="embed" xlink:actuate="onLoad" draw:mime-type="image/png"/><svg:desc>https://lh7-rt.googleusercontent.com/docsz/AD_4nXcFwzuqJESHiKnzjtobzbYx0mjtmgDKhP1vt7tNV-HDauU48zxUkGd-pKyNsW02hpKKrofrUyNZ40_F69R0wRny-MH1hwNVlMgFRWuB7b_U3m8suW1wb-imnhfeAOBwIASNhIC9ag?key=76FF-Krw-BLh9M7WPOQ3XmRz</svg:desc></draw:frame><text:bookmark-end text:name="_Toc185182934"/><text:bookmark-end text:name="_Toc185182826"/><text:span text:style-name="T13">La préparation du câble est donc terminée :</text:span><text:bookmark-end text:name="_Toc185198007"/><text:bookmark-end text:name="_Toc185198805"/><text:span text:style-name="T13"> </text:span><text:bookmark-end text:name="_Toc185182824"/><text:bookmark-end text:name="_Toc185182932"/></text:h>
      <text:p text:style-name="P89"><text:bookmark-start text:name="_Toc185197792"/><text:span text:style-name="T15">Figure 3 : <text:s/>Les différentes étapes de la réalisation du câble Mâle RJ45.</text:span><text:bookmark-end text:name="_Toc185197792"/></text:p>
      <text:h text:style-name="P19" text:outline-level="1"><text:bookmark-start text:name="_Toc185182827"/><text:bookmark-start text:name="_Toc185198806"/><text:bookmark-start text:name="_Toc185198008"/><text:bookmark-start text:name="_Toc185182935"/><text:span text:style-name="T10">Une fois les 2 câbles finis, nous avons vérifié que les câbles fonctionnaient bien grâce à un testeur. Une fois cette étape passée, nous avons pu réaliser le câblage de l’AP ci-dessous :</text:span><text:bookmark-end text:name="_Toc185182827"/><text:bookmark-end text:name="_Toc185198806"/><text:bookmark-end text:name="_Toc185198008"/><text:bookmark-end text:name="_Toc185182935"/></text:h>
      <text:h text:style-name="P18" text:outline-level="1"><text:bookmark-start text:name="_Toc185198807"/><text:bookmark-start text:name="_Toc185198009"/><text:bookmark-start text:name="_Toc185182936"/><text:bookmark-start text:name="_Toc185182828"/><draw:frame draw:style-name="fr1" draw:name="Image 10" text:anchor-type="char" svg:x="0.2819in" svg:y="0.0134in" svg:width="3.1827in" svg:height="0.9681in" draw:z-index="35"><draw:image xlink:href="Pictures/1000020100000296000000C9FC61BEFA15D5635C.png" xlink:type="simple" xlink:show="embed" xlink:actuate="onLoad" draw:mime-type="image/png"/><svg:desc>https://lh7-rt.googleusercontent.com/docsz/AD_4nXe4VAq244JLZYlI78bAvffeX7lQ-bbXKYh8wAQXZXRQthJZTuLiAT9UXgcrYiWdO94r-NYh-qBRr8QR6rVb6dv54439VVvrNx6oupEAApvUJIioZwIEzyQlnZyNPoko0u3JvixJVg?key=76FF-Krw-BLh9M7WPOQ3XmRz</svg:desc><draw:contour-polygon svg:width="658px" svg:height="194px" svg:viewBox="0 0 658 194" draw:points="0,0 0,194 658,194 658,0" draw:recreate-on-edit="false"/></draw:frame><text:bookmark-end text:name="_Toc185198807"/><text:bookmark-end text:name="_Toc185198009"/><text:bookmark-end text:name="_Toc185182936"/><text:bookmark-end text:name="_Toc185182828"/></text:h>
      <text:p text:style-name="P89"><text:bookmark-start text:name="_Toc185197793"/><text:span text:style-name="T15">Figure 5 : Le schéma de câblage à réaliser (schéma du PowerPoint de présentation de la SAE).</text:span><text:bookmark-end text:name="_Toc185197793"/></text:p>
      <text:list xml:id="list221210959638723" text:continue-numbering="true" text:style-name="WWNum4">
        <text:list-item>
          <text:h text:style-name="P20" text:outline-level="1"><text:bookmark-start text:name="_Toc185182829"/><text:bookmark-start text:name="_Toc185198808"/><text:soft-page-break/><text:span text:style-name="T51">Mesures du PoE du switch</text:span><text:bookmark-end text:name="_Toc185182829"/><text:bookmark-end text:name="_Toc185198808"/><text:span text:style-name="T51"> </text:span></text:h>
        </text:list-item>
      </text:list>
      <text:p text:style-name="P45"><text:span text:style-name="T60">Cisco Catalyst 3750-48PS</text:span><text:span text:style-name="T61"> </text:span></text:p>
      <text:p text:style-name="P45"><text:span text:style-name="T61">Il est important de noter que la puissance maximale par port est de </text:span><text:span text:style-name="T60">15,4 watts</text:span><text:span text:style-name="T61">. </text:span></text:p>
      <text:p text:style-name="P59"><text:span text:style-name="T61">Par conséquent, le commutateur peut alimenter simultanément jusqu’à </text:span><text:span text:style-name="T60">24 ports à 15,4W</text:span><text:span text:style-name="T61"> chacun, ou les 48 ports à une puissance réduite de 7,7W par port.</text:span><text:span text:style-name="T14"> <text:tab/><text:tab/><text:tab/><text:tab/><text:tab/><text:tab/><text:tab/><text:tab/><text:tab/></text:span><text:span text:style-name="T61">En ce qui concerne la tension, le standard IEEE 802.3af, supporté par ce commutateur, fournit une tension nominale de </text:span><text:span text:style-name="T60">48 volts DC</text:span><text:span text:style-name="T61"> aux dispositifs alimentés. Ainsi, chaque port PoE délivre une tension de 48V DC aux appareils connectés.</text:span><text:span text:style-name="T14"><text:tab/><text:tab/><text:tab/><text:tab/><text:tab/><text:tab/><text:tab/><text:tab/><text:tab/><text:tab/><text:tab/><text:tab/> <text:s/></text:span><text:span text:style-name="T61">En résumé, le Cisco Catalyst 3750-48PS offre une </text:span><text:span text:style-name="T60">puissance PoE totale de 370W</text:span><text:span text:style-name="T61">, avec une tension de 48V DC par port, permettant une flexibilité dans l’alimentation des dispositifs réseau compatibles PoE.</text:span></text:p>
      <text:p text:style-name="P60"><draw:frame text:anchor-type="paragraph" draw:z-index="7" draw:name="Image 9" draw:style-name="gr21" draw:text-style-name="P91" svg:width="1.5661in" svg:height="1.1776in" draw:transform="rotate (1.5707963267949) translate (1.6375in 1.58194444444444in)"><draw:image xlink:href="Pictures/100000000000015800000103905A2C8B52289CCF.jpg" xlink:type="simple" xlink:show="embed" xlink:actuate="onLoad" draw:mime-type="image/jpeg"><text:p/></draw:image><svg:desc>Une image contenant texte, horloge, Instrument de mesure, Horloge numérique

Description générée automatiquement</svg:desc></draw:frame><draw:frame text:anchor-type="paragraph" draw:z-index="6" draw:name="Image 10" draw:style-name="gr21" draw:text-style-name="P91" svg:width="1.598in" svg:height="1.2024in" draw:transform="rotate (1.5707963267949) translate (0.326388888888889in 1.61319444444444in)"><draw:image xlink:href="Pictures/1000000000000160000001099D7289C65DBB2E22.jpg" xlink:type="simple" xlink:show="embed" xlink:actuate="onLoad" draw:mime-type="image/jpeg"><text:p/></draw:image><svg:desc>Une image contenant texte, horloge, regarder, Instrument de mesure

Description générée automatiquement</svg:desc></draw:frame></text:p>
      <text:p text:style-name="P60"><draw:custom-shape text:anchor-type="paragraph" style:rel-height="20%" draw:z-index="9" draw:name="Zone de texte 2" draw:style-name="gr20" draw:text-style-name="P90" svg:width="2.1598in" svg:height="0.2858in" svg:x="3.0102in" svg:y="0.0425in"><text:p text:style-name="Frame_20_contents"><text:span text:style-name="T65"> </text:span><text:span text:style-name="T66">← <text:s text:c="4"/>Puissance délivré</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0"/>
      <text:p text:style-name="P60"/>
      <text:p text:style-name="P60"/>
      <text:p text:style-name="P60"><draw:custom-shape text:anchor-type="paragraph" draw:z-index="10" draw:name="Zone de texte 1" draw:style-name="gr19" draw:text-style-name="P90" svg:width="1.2024in" svg:height="0.1516in" svg:x="0.4311in" svg:y="0.2035in"><text:p text:style-name="caption"><text:bookmark-start text:name="_Toc185197794"/><text:bookmark-start text:name="_Toc185197960"/>Figure 6 : Testeur PoE.<text:bookmark-end text:name="_Toc185197794"/><text:bookmark-end text:name="_Toc18519796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0"/>
      <text:p text:style-name="P45"><text:span text:style-name="T62">Cisco - AIR-AP1231G-E-K9</text:span></text:p>
      <text:p text:style-name="P45"><text:span text:style-name="T63">Le </text:span><text:span text:style-name="T62">Cisco AIR-AP1231G-E-K9</text:span><text:span text:style-name="T63"> alimentation via PoE (</text:span><text:span text:style-name="T62">Power over Ethernet</text:span><text:span text:style-name="T63">).</text:span></text:p>
      <text:p text:style-name="P59"><text:span text:style-name="T61">Caractéristiques PoE :</text:span></text:p>
      <text:p text:style-name="P45"><text:span text:style-name="T61">Support PoE :</text:span></text:p>
      <text:p text:style-name="P59"><text:span text:style-name="T61"><text:tab/>-<text:tab/>Compatible avec le standard </text:span><text:span text:style-name="T60">IEEE 802.3af</text:span><text:span text:style-name="T61"> (PoE).</text:span></text:p>
      <text:p text:style-name="P59"><text:span text:style-name="T61"><text:tab/>-<text:tab/>Permet d’</text:span><text:span text:style-name="T60">alimenter l’appareil via un câble Ethernet</text:span><text:span text:style-name="T61">, évitant ainsi l’utilisation de câbles d’alimentation supplémentaires.</text:span></text:p>
      <text:p text:style-name="P45"><text:span text:style-name="T61">Flexibilité d’alimentation :</text:span></text:p>
      <text:p text:style-name="P59"><text:span text:style-name="T61"><text:tab/>-<text:tab/>Fonctionne à la fois avec une alimentation locale</text:span><text:span text:style-name="T64"> </text:span><text:span text:style-name="T61">(via adaptateur secteur) et </text:span><text:span text:style-name="T60">PoE</text:span><text:span text:style-name="T61">.</text:span></text:p>
      <text:p text:style-name="P59"><text:span text:style-name="T61"><text:tab/>-<text:tab/>Idéal pour des installations dans des endroits difficiles d’accès ou sans prise électrique.</text:span></text:p>
      <text:p text:style-name="P45"><text:span text:style-name="T61">Puissance requise :</text:span></text:p>
      <text:p text:style-name="P59"><draw:frame draw:style-name="fr8" draw:name="Image11" text:anchor-type="char" svg:x="3.6in" svg:y="0.2846in" svg:width="2.9583in" svg:height="1.7752in" draw:z-index="9"><draw:image xlink:href="Pictures/100000000000028C0000018787D0489D738D33D5.png" xlink:type="simple" xlink:show="embed" xlink:actuate="onLoad" draw:mime-type="image/png"/><svg:desc>Une image contenant texte, capture d’écran, Police, nombre

Description générée automatiquement</svg:desc></draw:frame><text:span text:style-name="T61"><text:tab/>-<text:tab/>Consomme une puissance moyenne adaptée à un injecteur PoE standard. PoE norme IEEE 802.3af </text:span><text:span text:style-name="T60">48 volts</text:span><text:span text:style-name="T64"> </text:span><text:span text:style-name="T61">DC (courant continue) </text:span><text:span text:style-name="T60">12.95 watts.</text:span></text:p>
      <text:p text:style-name="P61"/>
      <text:p text:style-name="P61"/>
      <text:p text:style-name="P62"/>
      <text:p text:style-name="P47"><draw:custom-shape text:anchor-type="paragraph" draw:z-index="11" draw:name="Zone de texte 15" draw:style-name="gr18" draw:text-style-name="P90" svg:width="1.8524in" svg:height="0.174in" svg:x="1.2898in" svg:y="0.3075in"><text:p text:style-name="caption"><text:bookmark-start text:name="_Toc185197795"/><text:bookmark-start text:name="_Toc185197961"/>Figure 7 : Tableau de comparaison.<text:bookmark-end text:name="_Toc185197795"/><text:bookmark-end text:name="_Toc18519796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221211354570188" text:continue-numbering="true" text:style-name="WWNum4">
        <text:list-item>
          <text:h text:style-name="P26" text:outline-level="1"><text:bookmark-start text:name="_Toc185182830"/><text:bookmark-start text:name="_Toc185198809"/><text:span text:style-name="T51">Mesures de puissance de notre Réseau</text:span><text:bookmark-end text:name="_Toc185182830"/><text:bookmark-end text:name="_Toc185198809"/></text:h>
        </text:list-item>
      </text:list>
      <text:h text:style-name="P28" text:outline-level="1"><text:bookmark-start text:name="_Toc185182831"/><text:bookmark-start text:name="_Toc185198810"/><text:bookmark-start text:name="_Toc185198012"/><text:bookmark-start text:name="_Toc185182939"/><text:span text:style-name="T42">Cette section présente les mesures de puissance pour le réseau (GRA) en 802.11g et 802.11a. Nous analyserons les performances selon la distance, les pertes dues aux obstacles et comparerons les résultats obtenus avec différents équipements (smartphones et ordinateurs). Ces tests permettent de mieux comprendre l’impact des environnements sur la qualité du signal et d’évaluer les différences entre les deux normes.</text:span><text:bookmark-end text:name="_Toc185182831"/><text:bookmark-end text:name="_Toc185198810"/><text:bookmark-end text:name="_Toc185198012"/><text:bookmark-end text:name="_Toc185182939"/></text:h>
      <text:list xml:id="list3577025359" text:style-name="WWNum14">
        <text:list-item>
          <text:h text:style-name="P21" text:outline-level="1"><text:bookmark-start text:name="_Toc185182832"/><text:bookmark-start text:name="_Toc185198811"/><text:span text:style-name="T53">Le Réseau 802.11Gg</text:span><text:bookmark-end text:name="_Toc185182832"/><text:bookmark-end text:name="_Toc185198811"/><text:span text:style-name="T53"> </text:span></text:h>
        </text:list-item>
      </text:list>
      <text:list xml:id="list3761342154" text:style-name="WWNum15">
        <text:list-item>
          <text:h text:style-name="P22" text:outline-level="1"><text:bookmark-start text:name="_Toc185182833"/><text:bookmark-start text:name="_Toc185198812"/><text:span text:style-name="T54">Diagramme de réception</text:span><text:bookmark-end text:name="_Toc185182833"/><text:bookmark-end text:name="_Toc185198812"/></text:h>
        </text:list-item>
      </text:list>
      <text:h text:style-name="P29" text:outline-level="1"><text:bookmark-start text:name="_Toc185182834"/><text:bookmark-start text:name="_Toc185198813"/><text:bookmark-start text:name="_Toc185198015"/><text:bookmark-start text:name="_Toc185182942"/><text:span text:style-name="T36">Les mesures de la puissance du signal à 2,4 GHz ont été effectuées à l'extérieur du bâtiment C à différentes distances de l'AP : 3 mètres, 10 mètres, 30 mètres et 80 mètres. Les tests ont été réalisés avec un téléphone, un ordinateur portable 1 et un ordinateur portable 2, à l'aide de l'application Wifi Analyzer pour analyser la réception du signal.</text:span><text:bookmark-end text:name="_Toc185182834"/><text:bookmark-end text:name="_Toc185198813"/><text:bookmark-end text:name="_Toc185198015"/><text:bookmark-end text:name="_Toc185182942"/></text:h>
      <text:h text:style-name="P30" text:outline-level="1"><text:bookmark-start text:name="_Toc185198814"/><text:bookmark-start text:name="_Toc185198016"/><text:bookmark-start text:name="_Toc185182943"/><text:bookmark-start text:name="_Toc185182835"/><draw:frame draw:style-name="fr7" draw:name="Image 422158180" text:anchor-type="as-char" svg:width="3.0161in" svg:height="2.2618in" draw:z-index="1"><draw:image xlink:href="Pictures/100000000000029B000001F4159F791386750ACA.png" xlink:type="simple" xlink:show="embed" xlink:actuate="onLoad" draw:mime-type="image/png"/><svg:desc>https://lh7-rt.googleusercontent.com/docsz/AD_4nXdLqJnUiBsuPGrSBs-jrCePlAFkd9mem6-l5OY5fHSsuAwVC81yULBiJLMx4aQVE2Hu5KA5vObhHxxf0NtXqGT9RcMDt7eHpztvpdOtUyYO5Z3Ndh9GdUoPoDNH6_9JHc1qa-v52A?key=76FF-Krw-BLh9M7WPOQ3XmRz</svg:desc></draw:frame><text:bookmark-end text:name="_Toc185198814"/><text:bookmark-end text:name="_Toc185198016"/><text:bookmark-end text:name="_Toc185182943"/><text:bookmark-end text:name="_Toc185182835"/></text:h>
      <text:p text:style-name="P89"><text:bookmark-start text:name="_Toc185197796"/><text:bookmark-start text:name="_Toc185197962"/><text:span text:style-name="T15">Figure 8 : Diagramme de réception en 2.4GHz</text:span><text:bookmark-end text:name="_Toc185197796"/><text:bookmark-end text:name="_Toc185197962"/><text:span text:style-name="T15">.</text:span></text:p>
      <text:p text:style-name="P36"><text:span text:style-name="T34">À 3 mètres de l'AP, la puissance du signal est relativement forte, bien que le téléphone subisse déjà des pertes notables comparé aux ordinateurs. En augmentant la distance à 10 mètres, on observe une diminution de la qualité du signal, en particulier pour le téléphone, qui subit une perte plus importante que les ordinateurs.</text:span></text:p>
      <text:p text:style-name="P36"><text:span text:style-name="T34">À 30 mètres, la puissance du signal continue de diminuer, mais les ordinateurs conservent une meilleure réception par rapport au téléphone, qui montre des signes de faiblesse plus marqués. Enfin, à 80 mètres, le signal est très faible pour le téléphone, tandis que les ordinateurs montrent des pertes plus modérées.</text:span></text:p>
      <text:p text:style-name="P36"><text:span text:style-name="T34">Ces tests ont mis en évidence l'impact de la distance sur la qualité du signal à 2,4 GHz et ont révélé que les téléphones, en raison de leurs antennes plus petites, sont plus sensibles aux pertes de signal que les ordinateurs. Les ordinateurs ont maintenu une réception plus stable sur les distances plus longues.</text:span></text:p>
      <text:p text:style-name="P48"><text:soft-page-break/></text:p>
      <text:list xml:id="list221212432846435" text:continue-list="list3577025359" text:style-name="WWNum14">
        <text:list-item>
          <text:h text:style-name="P21" text:outline-level="1"><text:bookmark-start text:name="_Toc185182841"/><text:bookmark-start text:name="_Toc185198815"/><text:span text:style-name="T53">Le Réseau 802.11a</text:span><text:bookmark-end text:name="_Toc185182841"/><text:bookmark-end text:name="_Toc185198815"/></text:h>
        </text:list-item>
      </text:list>
      <text:list xml:id="list999926817" text:style-name="WWNum16">
        <text:list-item>
          <text:h text:style-name="P23" text:outline-level="1"><text:bookmark-start text:name="_Toc185182842"/><text:bookmark-start text:name="_Toc185198816"/><text:span text:style-name="T54">Diagramme de réception</text:span><text:bookmark-end text:name="_Toc185182842"/><text:bookmark-end text:name="_Toc185198816"/></text:h>
        </text:list-item>
      </text:list>
      <text:h text:style-name="P29" text:outline-level="1"><text:bookmark-start text:name="_Toc185182843"/><text:bookmark-start text:name="_Toc185198817"/><text:bookmark-start text:name="_Toc185182951"/><text:span text:style-name="T36">Les mesures de la puissance du signal à 5 GHz ont également été réalisées à l'extérieur du bâtiment C, aux mêmes distances : 3 mètres, 10 mètres, 30 mètres et 80 mètres. Ces tests ont été effectués à l'aide d'un téléphone, d'un ordinateur portable 1 et d'un ordinateur portable 2, en utilisant l'application Wifi Analyzer.</text:span><text:bookmark-end text:name="_Toc185182843"/><text:bookmark-end text:name="_Toc185198817"/><text:bookmark-end text:name="_Toc185182951"/></text:h>
      <text:h text:style-name="P30" text:outline-level="1"><text:bookmark-start text:name="_Toc185198818"/><text:bookmark-start text:name="_Toc185182952"/><text:bookmark-start text:name="_Toc185182844"/><draw:frame draw:style-name="fr7" draw:name="Image 422158181" text:anchor-type="as-char" svg:width="3.7638in" svg:height="2.5917in" draw:z-index="2"><draw:image xlink:href="Pictures/10000201000002420000018EB09C6551B9949C09.png" xlink:type="simple" xlink:show="embed" xlink:actuate="onLoad" draw:mime-type="image/png"/><svg:desc>https://lh7-rt.googleusercontent.com/docsz/AD_4nXfyl7BBOVhMHSOoyJgBq2O2fR0B7dYFbsjqP_3pNDXjtPKh3D0buZY7Xm9wFLQIr-R8zJiBu02Oa1g-xJpD46juBhBQL7PEFiD0pL9Pb518sDYvUtvHoc4GJwHUAWX-QJrMuZzBWQ?key=76FF-Krw-BLh9M7WPOQ3XmRz</svg:desc></draw:frame><text:bookmark-end text:name="_Toc185198818"/><text:bookmark-end text:name="_Toc185182952"/><text:bookmark-end text:name="_Toc185182844"/></text:h>
      <text:p text:style-name="P89"><text:span text:style-name="T15">Figure 9 : Diagramme de réception en 5GHz.</text:span></text:p>
      <text:p text:style-name="P36"><text:span text:style-name="T34">À 3 mètres, la réception du signal à 5 GHz est globalement satisfaisante pour tous les appareils, bien que le téléphone montre une puissance légèrement meilleure que les ordinateurs. À 10 mètres, une forte disparité apparaît : le téléphone affiche une meilleure réception que les ordinateurs, ce qui est inhabituel et pourrait être attribué à des variations matérielles ou d’environnement.</text:span></text:p>
      <text:p text:style-name="P36"><text:span text:style-name="T34">À 30 mètres, la réception du signal diminue pour le téléphone, qui montre des pertes significatives. Les ordinateurs, en revanche, maintiennent une performance relativement constante, bien que plus faible globalement. À 80 mètres, la réception du téléphone est complètement perdue, tandis que les ordinateurs affichent des niveaux similaires aux distances précédentes, ce qui suggère que leurs performances sont moins affectées par la distance à 5 GHz.</text:span></text:p>
      <text:p text:style-name="P36"><text:span text:style-name="T34">Ces observations montrent que la fréquence 5 GHz, bien qu’offrant de meilleures vitesses potentielles, subit des pertes importantes avec la distance. Les ordinateurs, grâce à des antennes généralement plus performantes, gèrent mieux ces pertes que les téléphones, mais la stabilité globale reste inférieure à celle observée sur la bande 2,4 GHz.</text:span></text:p>
      <text:list xml:id="list221211284818868" text:continue-list="list221211354570188" text:style-name="WWNum4">
        <text:list-item>
          <text:h text:style-name="P26" text:outline-level="1"><text:bookmark-start text:name="_Toc185182850"/><text:bookmark-start text:name="_Toc185198819"/><text:span text:style-name="T51">Heatmap du Réseau GRA en 802.11g et 802.11a</text:span><text:bookmark-end text:name="_Toc185182850"/><text:bookmark-end text:name="_Toc185198819"/></text:h>
        </text:list-item>
      </text:list>
      <text:p text:style-name="P47"/>
      <text:p text:style-name="P44"><text:span text:style-name="T36">Dans cette section, nous allons présenter et analyser les Heatmaps générées pour notre réseau Wi-Fi en 802.11g (2.4 GHz) et 802.11a (5 GHz) au sein des salles C100, C101 et C102. Ces cartes de chaleur illustrent la couverture de notre réseau en fonction de la distance par rapport au point d'accès, et permettent d'observer l'impact des différents obstacles sur la qualité du signal. Nous commenterons les différences de couverture entre les deux normes, en mettant en évidence les zones où le signal reste fort et celles où il souffre d'atténuation importante.</text:span></text:p>
      <text:list xml:id="list64272307" text:style-name="WWNum20">
        <text:list-item>
          <text:h text:style-name="P24" text:outline-level="1"><text:bookmark-start text:name="_Toc185198820"/><text:span text:style-name="T53">En 802.11g</text:span><text:bookmark-end text:name="_Toc185198820"/></text:h>
        </text:list-item>
      </text:list>
      <text:h text:style-name="P32" text:outline-level="2"><text:bookmark-start text:name="_Toc185198821"/><text:span text:style-name="T36">Pour la norme 2.4 GHz, la couverture du réseau est plutôt bonne près du point d’accès dans la salle C100, où la couleur orange indique une forte puissance du signal. En s'éloignant de l'AP, notamment dans la salle C101, le signal devient plus faible, passant à des teintes vert clair et vert, indiquant une perte de signal modérée. Enfin, dans la salle C102, la couverture devient encore plus faible, avec une couleur bleue, ce qui montre une perte importante de signal. Cette baisse de puissance est particulièrement visible à mesure qu'on s'éloigne du point d’accès et à travers les différentes pièces, comme pouvons-nous le voir ci-dessous :</text:span><text:bookmark-end text:name="_Toc185198821"/></text:h>
      <text:h text:style-name="P27" text:outline-level="1"><text:bookmark-start text:name="_Toc185198822"/><draw:frame draw:style-name="fr7" draw:name="Image 207481571" text:anchor-type="as-char" svg:width="3.8799in" svg:height="1.3819in" draw:z-index="3"><draw:image xlink:href="Pictures/1000020100000264000000DA6F562DCC2105EA3E.png" xlink:type="simple" xlink:show="embed" xlink:actuate="onLoad" draw:mime-type="image/png"/><svg:desc>https://lh7-rt.googleusercontent.com/docsz/AD_4nXeTcQnjgRxcMBqsPRhCRiAqVWveDGSC3sflnOkM5KOqJ4T2HS5cX85LxIWCvvC3wtRXPlGhkZy-QuZWkVFoHSSmzBP4QkEhP1r_O4azZ_1WZo3kewB75BhOeEfKJ6bXF5MV0Et1aA?key=76FF-Krw-BLh9M7WPOQ3XmRz</svg:desc></draw:frame><text:bookmark-end text:name="_Toc185198822"/></text:h>
      <text:p text:style-name="P89"><text:span text:style-name="T15">Figure 10 : Heatmap de GRA_802.11g.</text:span></text:p>
      <text:list xml:id="list221213101403859" text:continue-numbering="true" text:style-name="WWNum20">
        <text:list-item>
          <text:h text:style-name="P24" text:outline-level="1"><text:bookmark-start text:name="_Toc185198823"/><text:span text:style-name="T53">En 802.11a</text:span><text:bookmark-end text:name="_Toc185198823"/></text:h>
        </text:list-item>
      </text:list>
      <text:p text:style-name="P44"><text:span text:style-name="T36">En 5 GHz, la couverture du réseau est beaucoup plus limitée. Dans la salle C100, près du point d’accès, la couleur bleue claire représente une faible puissance du signal. Plus on s’éloigne de l'AP, notamment dans la salle C101 et C102, la couleur devient un bleu plus foncé, ce qui indique une perte significative de signal. Dans la salle C102, nous n'avons pas réussi à capturer le signal, confirmant que la bande 5 GHz a une portée réduite et est plus sensible aux obstacles et à la distance. Comparativement à la norme 2.4 GHz, le 5 GHz souffre d’une couverture beaucoup plus restreinte dans les mêmes zones, comme pouvons-nous le voir ci-dessous :</text:span></text:p>
      <text:p text:style-name="P49"><draw:frame draw:style-name="fr1" draw:name="Image 207481572" text:anchor-type="char" svg:x="0.0126in" svg:y="0.0126in" svg:width="2.8256in" svg:height="0.9665in" draw:z-index="62"><draw:image xlink:href="Pictures/1000020100000243000000C6C5EF26C5CD828530.png" xlink:type="simple" xlink:show="embed" xlink:actuate="onLoad" draw:mime-type="image/png"/><svg:desc>https://lh7-rt.googleusercontent.com/docsz/AD_4nXdNWSAlwQOa5F1rQKq9DN6ZoDulLrE_wFX0L3WHEimH595JVdWXDvTiCjZ88hSdNKg9hOj6JAM8Iq2yvooq22aIqyL2YBBWvy7VPLFxbNyMC7zcmOhBBuCWGFAjzy5qMv1iIXxMow?key=76FF-Krw-BLh9M7WPOQ3XmRz</svg:desc><draw:contour-polygon svg:width="576px" svg:height="192px" svg:viewBox="0 0 576 192" draw:points="0,0 0,192 576,192 576,0" draw:recreate-on-edit="false"/></draw:frame></text:p>
      <text:p text:style-name="P66"/>
      <text:p text:style-name="P89"><text:span text:style-name="T15">Figure 11 : Heatmap de GRA_802.11a</text:span></text:p>
      <text:p text:style-name="P39"/>
      <text:p text:style-name="P67"/>
      <text:list xml:id="list221213041417528" text:continue-list="list221211284818868" text:style-name="WWNum4">
        <text:list-item>
          <text:h text:style-name="P20" text:outline-level="1"><text:bookmark-start text:name="_Toc185198824"/><text:span text:style-name="T51">Débits Descendants : Réception et Distance en 802.11g et 802.11a</text:span><text:bookmark-end text:name="_Toc185198824"/></text:h>
        </text:list-item>
      </text:list>
      <text:list xml:id="list3778941463" text:style-name="WWNum21">
        <text:list-item>
          <text:h text:style-name="P25" text:outline-level="1"><text:bookmark-start text:name="_Toc185198825"/><text:span text:style-name="T53">En 802.11g</text:span><text:bookmark-end text:name="_Toc185198825"/></text:h>
        </text:list-item>
      </text:list>
      <text:p text:style-name="P68"><draw:custom-shape text:anchor-type="paragraph" style:rel-height="20%" draw:z-index="14" draw:name="Zone de texte 2" draw:style-name="gr17" draw:text-style-name="P90" svg:width="1.1185in" svg:height="0.3024in" svg:x="1.5957in" svg:y="3.8811in"><text:p text:style-name="Frame_20_contents"><text:span text:style-name="T49">Salle C100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height="20%" draw:z-index="62" draw:name="Zone de texte 2" draw:style-name="gr1" draw:text-style-name="P90" svg:width="1.1185in" svg:height="0.3024in" svg:x="2.8126in" svg:y="3.8728in"><text:p text:style-name="Frame_20_contents"><text:span text:style-name="T49">Salle C001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 draw:name="Image 207481587" text:anchor-type="char" svg:x="5.0075in" svg:y="3.9307in" svg:width="2.139in" svg:height="0.5346in" draw:z-index="14"><draw:image xlink:href="Pictures/10000000000001D60000007680E630E32646C332.png" xlink:type="simple" xlink:show="embed" xlink:actuate="onLoad" draw:mime-type="image/png"/><svg:desc>https://lh7-rt.googleusercontent.com/docsz/AD_4nXdm13ugYVQ2kQRQgjrczd-BC3I8yp4OjyYh1MtpkcVHLU32w6Fl5s41f2Ira7Hhn_cs4F4jWjUBbBADii21EchTo9JCUvvYaMrg9ZYI_yBt6uwRTGWzaEnOyM7GrxqrEGSmLRplOQ?key=76FF-Krw-BLh9M7WPOQ3XmRz</svg:desc><draw:contour-polygon svg:width="2.1122in" svg:height="0.5244in" svg:viewBox="0 0 5365 1332" draw:points="25,0 25,1332 5390,1332 5390,0" draw:recreate-on-edit="false"/></draw:frame><text:span text:style-name="T35">Les mesures effectuées sur le réseau GRA en 2,4 GHz ont permis de caractériser les pertes du signal en fonction des obstacles rencontrés. À proximité de l'AP (1 mètre), la puissance est très forte à -10 dBm, indiquant une perte minimale. En revanche, lorsqu’un obstacle tel qu’une vitre se trouve entre l’AP et le récepteur, la puissance chute à -55 dBm à 3 mètres, soit une perte de 45 dB. Lorsqu'un mur (en placo) est traversé, la puissance mesurée est de -58 dBm à 10 mètres, entraînant une perte de 48 dB. D’autres obstacles, comme un tableau et un mur (en placo), réduisent également la puissance à -49 dBm à 7 mètres, soit une perte de 39 dB. En traversant un étage, la puissance chute à -63 dBm à 10 mètres, soit une perte de 53 dB. Les différentes salles ont montré des variations de puissance mesurée : à la salle C01, la puissance est de -64 dBm ; à la salle C100, elle est de -76 dBm ; et à la salle C102, elle est de -82 dBm. Ces résultats montrent clairement que les obstacles tels que les murs et les étages impactent fortement la puissance du signal en 2,4 GHz, bien que cette fréquence reste plus performante que le 5 GHz dans les environnements complexes</text:span><text:span text:style-name="T38">.<text:tab/><text:tab/><text:tab/><text:tab/><text:tab/><text:tab/><text:tab/><text:tab/><text:tab/><text:tab/><text:tab/>Voici les différents graphiques des salles C102, C100 et C001 :</text:span></text:p>
      <text:p text:style-name="P68"><draw:frame draw:style-name="fr1" draw:name="Image 19" text:anchor-type="char" svg:x="2.7756in" svg:y="0.178in" svg:width="1.0953in" svg:height="1.778in" draw:z-index="19"><draw:image xlink:href="Pictures/10000000000000F100000187F3C5141635149F0C.png" xlink:type="simple" xlink:show="embed" xlink:actuate="onLoad" draw:mime-type="image/png"/><svg:desc>Une image contenant texte, capture d’écran, conception

Description générée automatiquement</svg:desc><draw:contour-polygon svg:width="1.0736in" svg:height="1.7657in" svg:viewBox="0 0 2727 4485" draw:points="25,0 25,4485 2752,4485 2752,0" draw:recreate-on-edit="false"/></draw:frame><draw:frame draw:style-name="fr1" draw:name="Image 13" text:anchor-type="char" svg:x="4.578in" svg:y="0.4646in" svg:width="2.0953in" svg:height="0.5189in" draw:z-index="21"><draw:image xlink:href="Pictures/10000000000001A9000000693F2F2CA1716073F6.png" xlink:type="simple" xlink:show="embed" xlink:actuate="onLoad" draw:mime-type="image/png"/><svg:desc>Une image contenant texte, horloge, capture d’écran, Police

Description générée automatiquement</svg:desc><draw:contour-polygon svg:width="1.911in" svg:height="0.4622in" svg:viewBox="0 0 4854 1174" draw:points="25,0 25,1174 4879,1174 4879,0" draw:recreate-on-edit="false"/></draw:frame><draw:frame draw:style-name="fr2" draw:name="Image 17" text:anchor-type="char" svg:x="-0.0083in" svg:y="0.2299in" svg:width="1.2937in" svg:height="1.7374in" draw:z-index="20"><draw:image xlink:href="Pictures/100000000000011D0000017FDEC26BA722C23EE8.png" xlink:type="simple" xlink:show="embed" xlink:actuate="onLoad" draw:mime-type="image/png"/><svg:desc>Une image contenant texte, capture d’écran, Police, conception

Description générée automatiquement</svg:desc><draw:contour-polygon svg:width="1.2622in" svg:height="1.7252in" svg:viewBox="0 0 3206 4382" draw:points="25,0 25,4382 3231,4382 3231,0" draw:recreate-on-edit="false"/></draw:frame><draw:frame draw:style-name="fr1" draw:name="Image 21" text:anchor-type="char" svg:x="1.6189in" svg:y="0.1327in" svg:width="0.9374in" svg:height="1.878in" draw:z-index="18"><draw:image xlink:href="Pictures/10000000000000CE0000019EAC33E164E27050BB.png" xlink:type="simple" xlink:show="embed" xlink:actuate="onLoad" draw:mime-type="image/png"/><svg:desc>Une image contenant texte, capture d’écran, diagramme, Police

Description générée automatiquement</svg:desc><draw:contour-polygon svg:width="0.9055in" svg:height="1.8783in" svg:viewBox="0 0 2300 4771" draw:points="25,0 25,4771 2325,4771 2325,0" draw:recreate-on-edit="false"/></draw:frame><text:span text:style-name="T47">Salle C102: </text:span></text:p>
      <text:p text:style-name="P51"/>
      <text:p text:style-name="P51"><text:bookmark-start text:name="_Toc185198826"/><draw:frame draw:style-name="fr1" draw:name="Image 15" text:anchor-type="char" svg:x="4.578in" svg:y="0.2626in" svg:width="2.2083in" svg:height="0.5374in" draw:z-index="22"><draw:image xlink:href="Pictures/100000000000020A0000007FB4B3E8039BBDB4FE.png" xlink:type="simple" xlink:show="embed" xlink:actuate="onLoad" draw:mime-type="image/png"/><svg:desc>Une image contenant texte, horloge, capture d’écran, Police

Description générée automatiquement</svg:desc><draw:contour-polygon svg:width="2.3406in" svg:height="0.5614in" svg:viewBox="0 0 5945 1426" draw:points="25,0 25,1426 5970,1426 5970,0" draw:recreate-on-edit="false"/></draw:frame><text:bookmark-end text:name="_Toc185198826"/></text:p>
      <text:p text:style-name="P46"><text:span text:style-name="T47">    </text:span></text:p>
      <text:p text:style-name="P45"><text:span text:style-name="T16"><text:s/></text:span><text:span text:style-name="T38"><text:line-break/></text:span></text:p>
      <text:p text:style-name="P53"><draw:custom-shape text:anchor-type="paragraph" draw:z-index="15" draw:name="Zone de texte 207481581" draw:style-name="gr16" draw:text-style-name="P90" svg:width="2.6807in" svg:height="0.1531in" svg:x="4.448in" svg:y="0.0925in"><text:p text:style-name="caption">Figure 12 : Graphiques des salles C102, C101 et C00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 text:name="_Toc185198827"/></text:p>
      <text:list xml:id="list221213232143838" text:continue-numbering="true" text:style-name="WWNum21">
        <text:list-item>
          <text:h text:style-name="P25" text:outline-level="1"><text:bookmark-start text:name="_Toc185198828"/><text:span text:style-name="T53">En 802.11a</text:span><text:bookmark-end text:name="_Toc185198828"/></text:h>
        </text:list-item>
      </text:list>
      <text:h text:style-name="P16" text:outline-level="1"><text:bookmark-start text:name="_Toc185198829"/><text:span text:style-name="T36">Les mesures réalisées sur le réseau GRA en 5 GHz ont révélé des pertes de signal significatives en fonction des obstacles rencontrés. À 1 mètre de l'AP, sans obstacle, la puissance mesurée est de -59 dBm, indiquant une bonne réception. Cependant, à travers une vitre, la puissance chute rapidement à -82 dBm à 3 mètres, ce qui souligne que le 5 GHz est moins efficace pour traverser des matériaux que le 2,4 GHz. À 10 mètres, avec un mur, la puissance reste également à -82 dBm, indiquant une perte comparable. À travers un étage, la puissance mesurée est de -80 dBm, et avec un tableau et un mur à 7 mètres, elle est de -76 dBm. Ces mesures montrent que le 5 </text:span><text:soft-page-break/><text:span text:style-name="T36">GHz, bien qu’offrant des débits élevés, souffre davantage de la présence d’obstacles et de la distance, réduisant la portée et la qualité du signal. Les mesures dans les salles C01, C100 et C102 n'ont pas pu être réalisées</text:span><text:bookmark-end text:name="_Toc185198829"/><text:span text:style-name="T36">.</text:span></text:h>
      <text:list xml:id="list221212056528736" text:continue-list="list221213041417528" text:style-name="WWNum4">
        <text:list-item>
          <text:h text:style-name="P26" text:outline-level="1"><text:bookmark-start text:name="_Toc185198830"/><text:span text:style-name="T51">Informations remontées par le contrôleur en relation avec les informations réseau</text:span><text:bookmark-end text:name="_Toc185198830"/></text:h>
        </text:list-item>
      </text:list>
      <text:p text:style-name="P68"><text:span text:style-name="T38">Dans le cadre de la gestion du réseau Wifi GrA_802.11a et GrA_802.11b, le contrôleur centralise les informations relatives aux appareils mobiles connectés au réseau. Ces informations incluent les adresses IP et MAC des appareils, permettant une identification précise de chaque terminal connecté.</text:span></text:p>
      <text:p text:style-name="P68"><text:span text:style-name="T38">Lorsqu'un appareil se connecte au réseau, le contrôleur attribue une adresse IP via le serveur DHCP, puis enregistre l'adresse MAC de l'appareil pour suivre sa connexion. Par exemple, pour les appareils connectés dans notre réseau, les informations suivantes ont été remontées :</text:span></text:p>
      <text:list xml:id="list4072058546" text:style-name="WWNum24">
        <text:list-item>
          <text:p text:style-name="P70"><text:span text:style-name="T39">Adresse IP</text:span><text:span text:style-name="T38"> : 10.129.10.99, 10.129.10.102</text:span></text:p>
        </text:list-item>
        <text:list-item>
          <text:p text:style-name="P71"><text:span text:style-name="T39">Adresse MAC</text:span><text:span text:style-name="T38"> : 00:81:45:3f:cf:39, ae:c7:3e:de:ac:1e</text:span></text:p>
        </text:list-item>
      </text:list>
      <text:p text:style-name="P68"><text:span text:style-name="T38">Ces données permettent au contrôleur de gérer efficacement les connexions et de maintenir une performance optimale du réseau, en s'assurant que chaque appareil est bien authentifié et connecté au bon réseau Wifi. Elles servent aussi à la surveillance du réseau et à l'analyse des comportements de chaque utilisateur pour assurer la qualité de service.</text:span></text:p>
      <text:p text:style-name="P69"><draw:frame draw:style-name="fr7" draw:name="Image 207481573" text:anchor-type="as-char" svg:width="7.7291in" svg:height="1.0299in" draw:z-index="4"><draw:image xlink:href="Pictures/10000000000004840000009A0FE0C6043A24F18B.png" xlink:type="simple" xlink:show="embed" xlink:actuate="onLoad" draw:mime-type="image/png"/></draw:frame></text:p>
      <text:p text:style-name="P89"><text:span text:style-name="T15">Figure 13 : Informations de l'AP sur le contrôleur.</text:span></text:p>
      <text:p text:style-name="P43"/>
      <text:list xml:id="list221212667525112" text:continue-list="list221212056528736" text:style-name="WWNum4">
        <text:list-item>
          <text:h text:style-name="P31" text:outline-level="1"><text:span text:style-name="T51">Simulation Packet Tracer</text:span></text:h>
        </text:list-item>
      </text:list>
      <text:p text:style-name="P58"><draw:custom-shape text:anchor-type="paragraph" draw:z-index="35" draw:name="Zone de texte 35" draw:style-name="gr12" draw:text-style-name="P90" svg:width="2.4098in" svg:height="0.1516in" svg:x="0.3543in" svg:y="2.6661in"><text:p text:style-name="caption">Figure 14 : Réseau Wi-FI sur Packet Trace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Espace réservé du contenu 10" text:anchor-type="char" svg:x="0.3193in" svg:y="0.6591in" svg:width="3.2516in" svg:height="2.0228in" draw:z-index="17"><draw:image xlink:href="Pictures/100002010000031A000001EE710C6C8B4F8E1575.png" xlink:type="simple" xlink:show="embed" xlink:actuate="onLoad" draw:mime-type="image/png"/><svg:desc>Une image contenant texte, diagramme, carte, ligne

Description générée automatiquement</svg:desc><draw:contour-polygon svg:width="5.4661in" svg:height="3.3976in" svg:viewBox="0 0 13884 8630" draw:points="25,0 25,8630 13909,8630 13909,0" draw:recreate-on-edit="false"/></draw:frame><text:span text:style-name="T36">Ce projet consiste à simuler un réseau Wi-Fi sur Packet Tracer, en intégrant plusieurs équipements et configurations pour assurer la connectivité et les services associés.</text:span></text:p>
      <text:p text:style-name="P64"/>
      <text:p text:style-name="P64"/>
      <text:p text:style-name="P64"/>
      <text:p text:style-name="P64"/>
      <text:p text:style-name="P64"/>
      <text:p text:style-name="P64"/>
      <text:p text:style-name="P37"/>
      <text:p text:style-name="P36"><text:span text:style-name="Strong"><text:span text:style-name="T43">Salle Serveur IUT Colmar :</text:span></text:span></text:p>
      <text:p text:style-name="P36"><text:span text:style-name="T34">Le serveur DNS et le serveur Web sont configurés pour permettre la résolution de noms et l'accès au site </text:span><text:span text:style-name="Strong"><text:span text:style-name="T43">uha2.fr</text:span></text:span><text:span text:style-name="T34">. Le serveur DNS a l'adresse IP </text:span><text:span text:style-name="Strong"><text:span text:style-name="T43">10.252.4.2</text:span></text:span><text:span text:style-name="T34"> et le serveur Web est configuré avec l'adresse IP </text:span><text:span text:style-name="Strong"><text:span text:style-name="T43">10.252.5.12</text:span></text:span><text:span text:style-name="T44">,</text:span><text:span text:style-name="T34"> avec le domaine </text:span><text:span text:style-name="Strong"><text:span text:style-name="T43">uha2.fr</text:span></text:span><text:span text:style-name="T44">.</text:span></text:p>
      <text:p text:style-name="P36"><text:span text:style-name="Strong"><text:span text:style-name="T43">Salle C102</text:span></text:span><text:span text:style-name="T34"> : Le réseau principal est configuré de la manière suivante : le réseau est </text:span><text:span text:style-name="Strong"><text:span text:style-name="T43">10.129.10.0</text:span></text:span><text:span text:style-name="T34">, la passerelle a l'adresse </text:span><text:span text:style-name="Strong"><text:span text:style-name="T43">10.129.10.2</text:span></text:span><text:span text:style-name="T34"> et le contrôleur Wi-Fi possède l'interface de management </text:span><text:span text:style-name="Strong"><text:span text:style-name="T43">10.129.10.50</text:span></text:span><text:span text:style-name="T34">. Il gère également un serveur DHCP qui attribue des adresses IP dans la plage </text:span><text:span text:style-name="Strong"><text:span text:style-name="T43">10.129.10.12 à 10.129.10.22</text:span></text:span><text:span text:style-name="T34">. Deux réseaux Wi-Fi sont proposés :</text:span><text:span text:style-name="T44"> </text:span><text:span text:style-name="Strong"><text:span text:style-name="T43">GrA_802.11a</text:span></text:span><text:span text:style-name="T34"> (5 GHz) et </text:span><text:span text:style-name="Strong"><text:span text:style-name="T43">GrA_802.11b/g</text:span></text:span><text:span text:style-name="T34"> (2,4 GHz).</text:span></text:p>
      <text:p text:style-name="P36"><draw:frame draw:style-name="fr2" draw:name="Image12" text:anchor-type="char" svg:x="3.9256in" svg:y="0.9465in" svg:width="3.0244in" svg:height="1.7902in" draw:z-index="49"><draw:image xlink:href="Pictures/10000201000003E50000024E70D4BFF79EB4F2F1.png" xlink:type="simple" xlink:show="embed" xlink:actuate="onLoad" draw:mime-type="image/png"/><svg:desc>Une image contenant texte, capture d’écran, affichage, nombre

Description générée automatiquement</svg:desc><draw:contour-polygon svg:width="6.8579in" svg:height="4.0583in" svg:viewBox="0 0 17419 10308" draw:points="24,0 24,10308 17443,10308 17443,0" draw:recreate-on-edit="false"/></draw:frame><text:span text:style-name="Strong"><text:span text:style-name="T43">Salle C100</text:span></text:span><draw:frame draw:style-name="fr6" draw:name="Image14" text:anchor-type="char" svg:x="0.8043in" svg:y="0.9102in" svg:width="2.5598in" svg:height="1.8799in" draw:z-index="37"><draw:image xlink:href="Pictures/10000201000003EE000002CF1162B967918F5730.png" xlink:type="simple" xlink:show="embed" xlink:actuate="onLoad" draw:mime-type="image/png"/><svg:desc>Une image contenant texte, capture d’écran, affichage, logiciel

Description générée automatiquement</svg:desc><draw:contour-polygon svg:width="4.9972in" svg:height="3.6866in" svg:viewBox="0 0 12693 9364" draw:points="26,217 26,9581 12719,9581 12719,217" draw:recreate-on-edit="false"/></draw:frame><text:span text:style-name="T34"> : Un point d'accès (AP) simple est connecté à un switch dans la salle C102. Des appareils sans fil comme des PC et des smartphones se connectent aux réseaux Wi-Fi </text:span><text:span text:style-name="Strong"><text:span text:style-name="T43">GrA_802.11a</text:span></text:span><text:span text:style-name="T34"> et </text:span><text:span text:style-name="Strong"><text:span text:style-name="T43">GrA_802.11b/g</text:span></text:span><text:span text:style-name="T34">, et peuvent accéder au serveur Web via le DNS.</text:span></text:p>
      <text:p text:style-name="P52"/>
      <text:p text:style-name="P52"/>
      <text:p text:style-name="P52"/>
      <text:p text:style-name="P52"/>
      <text:p text:style-name="P52"/>
      <text:p text:style-name="P52"/>
      <text:p text:style-name="P52"><draw:custom-shape text:anchor-type="paragraph" draw:z-index="57" draw:name="Zone de texte 45" draw:style-name="gr5" draw:text-style-name="P90" svg:width="3.1461in" svg:height="0.1516in" svg:x="3.9008in" svg:y="0.0717in"><text:p text:style-name="caption">Figure 16 : Le Wireles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7" draw:name="Zone de texte 42" draw:style-name="gr7" draw:text-style-name="P90" svg:width="2.4516in" svg:height="0.1516in" svg:x="0.4339in" svg:y="0.0909in"><text:p text:style-name="caption">Figure 15 : Le Point d'Accès (AP)</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2"/>
      <text:p text:style-name="P52"/>
      <text:p text:style-name="P52"/>
      <text:p text:style-name="P44"><draw:custom-shape text:anchor-type="paragraph" draw:z-index="38" draw:name="Zone de texte 2" draw:style-name="gr11" draw:text-style-name="P90" svg:width="6.0697in" svg:height="1.3335in" svg:x="0.5311in" svg:y="0.2256in"><text:p text:style-name="Frame_20_contents"><text:span text:style-name="T36">Le</text:span><text:span text:style-name="T40"> </text:span><text:span text:style-name="Strong"><text:span text:style-name="T41">point d'accès (AP)</text:span></text:span><text:span text:style-name="T36"> est configuré pour prendre en charge les normes Wi-Fi 802.11a et 802.11b/g, ce qui permet aux appareils compatibles de se connecter. </text:span></text:p><text:p text:style-name="Frame_20_contents"><text:span text:style-name="T36">L’AP est configuré avec un mot de passe « gribouillis ».</text:span></text:p><text:p text:style-name="P11"/><text:p text:style-name="Frame_20_contents"><text:span text:style-name="T36">Le Wireless AP permet aux utilisateurs de se connecter eux ressources réseau comme le serveur Web, le serveur DNS sans avoir de câbles physiques.</text:span></text:p><text:p text:style-name="Frame_20_contents"/><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span text:style-name="T34"><text:line-break/><text:line-break/></text:span></text:p>
      <text:p text:style-name="P52"/>
      <text:p text:style-name="P52"/>
      <text:p text:style-name="P52"/>
      <text:p text:style-name="P52"/>
      <text:p text:style-name="P44"><text:span text:style-name="T34"><text:line-break/></text:span></text:p>
      <text:p text:style-name="P52"><draw:custom-shape text:anchor-type="paragraph" style:rel-width="40%" draw:z-index="39" draw:name="Zone de texte 2" draw:style-name="gr10" draw:text-style-name="P90" svg:width="3.0898in" svg:height="0.9862in" svg:x="3.9516in" svg:y="0.0307in"><text:p text:style-name="Frame_20_contents"><text:span text:style-name="T36">Le </text:span><text:span text:style-name="Strong"><text:span text:style-name="T41">serveur DNS</text:span></text:span><text:span text:style-name="T36"> résout le nom de domaine </text:span><text:span text:style-name="Strong"><text:span text:style-name="T41">uha2.fr</text:span></text:span><text:span text:style-name="T36"> afin que les utilisateurs puissent y accéder sans avoir besoin de connaître l'adresse IP.</text:span></text:p><text:p text:style-name="Frame_20_contents"/><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5" draw:name="Image16" text:anchor-type="char" svg:x="0.2437in" svg:y="0.0047in" svg:width="3.2563in" svg:height="1.2283in" draw:z-index="41"><draw:image xlink:href="Pictures/10000201000003E5000001532685F20BC9F154FE.png" xlink:type="simple" xlink:show="embed" xlink:actuate="onLoad" draw:mime-type="image/png"/><svg:desc>Une image contenant texte, capture d’écran, nombre, Police

Description générée automatiquement</svg:desc><draw:contour-polygon svg:width="6.1803in" svg:height="2.3185in" svg:viewBox="0 0 15698 5889" draw:points="21,0 21,5889 15719,5889 15719,0" draw:recreate-on-edit="false"/></draw:frame></text:p>
      <text:p text:style-name="P52"/>
      <text:p text:style-name="P52"/>
      <text:p text:style-name="P52"/>
      <text:p text:style-name="P52"/>
      <text:p text:style-name="P52"><draw:custom-shape text:anchor-type="paragraph" draw:z-index="41" draw:name="Zone de texte 43" draw:style-name="gr7" draw:text-style-name="P90" svg:width="3.2567in" svg:height="0.1516in" svg:x="0.3528in" svg:y="0.0126in"><text:p text:style-name="caption">Figure 17 : Le serveur DN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2"/>
      <text:p text:style-name="P52"><draw:frame draw:style-name="fr1" draw:name="Image 12" text:anchor-type="char" svg:x="3.2984in" svg:y="0.0457in" svg:width="3.4307in" svg:height="1.7217in" draw:z-index="44"><draw:image xlink:href="Pictures/10000201000003E4000001F4738B8962E53B1E55.png" xlink:type="simple" xlink:show="embed" xlink:actuate="onLoad" draw:mime-type="image/png"/><svg:desc>Une image contenant texte, capture d’écran, nombre, Police

Description générée automatiquement</svg:desc><draw:contour-polygon svg:width="6.8791in" svg:height="3.45in" svg:viewBox="0 0 17473 8763" draw:points="24,0 24,8763 17497,8763 17497,0" draw:recreate-on-edit="false"/></draw:frame></text:p>
      <text:p text:style-name="P52"/>
      <text:p text:style-name="P52"><draw:custom-shape text:anchor-type="paragraph" style:rel-width="40%" draw:z-index="42" draw:name="Zone de texte 2" draw:style-name="gr10" draw:text-style-name="P90" svg:width="3.0898in" svg:height="0.9862in" svg:x="0.139in" svg:y="0.0398in"><text:p text:style-name="Frame_20_contents"><text:span text:style-name="T36">Le </text:span><text:span text:style-name="Strong"><text:span text:style-name="T41">serveur DHCP</text:span></text:span><text:span text:style-name="T36"> attribue des adresses IP aux appareils connectés, permettant une gestion centralisée et une connectivité fluide.</text:span></text:p><text:p text:style-name="Frame_20_contents"/><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2"/>
      <text:p text:style-name="P52"/>
      <text:p text:style-name="P65"/>
      <text:p text:style-name="P65"><draw:custom-shape text:anchor-type="paragraph" draw:z-index="44" draw:name="Zone de texte 44" draw:style-name="gr7" draw:text-style-name="P90" svg:width="3.4307in" svg:height="0.1516in" svg:x="3.3437in" svg:y="0.1457in"><text:p text:style-name="caption">Figure 18 : Le serveur DHCP</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5"/>
      <text:p text:style-name="P65"/>
      <text:p text:style-name="P65"/>
      <text:p text:style-name="P44"><text:span text:style-name="T36">La simulation montre que tous les équipements sont correctement configurés et fonctionnent comme prévu. Le réseau Wi-Fi GrA_802.11a et GrA_802.11b/g a été testé et validé pour ses performances de connectivité et d'accès aux services réseau. L'ensemble des fonctionnalités a été vérifié avec succès, ce qui assure le bon fonctionnement du réseau dans son intégralité.</text:span></text:p>
      <text:p text:style-name="P48"/>
      <text:p text:style-name="P48"/>
      <text:p text:style-name="P48"/>
      <text:p text:style-name="P48"/>
      <text:p text:style-name="P76"/>
      <text:list xml:id="list221211508323886" text:continue-numbering="true" text:style-name="WWNum4">
        <text:list-item>
          <text:h text:style-name="P20" text:outline-level="1"><text:bookmark-start text:name="_Toc185182853"/><text:bookmark-start text:name="_Toc185198831"/><text:span text:style-name="T51">Heatmaps du Réseau uha</text:span><text:bookmark-end text:name="_Toc185182853"/><text:bookmark-end text:name="_Toc185198831"/></text:h>
        </text:list-item>
      </text:list>
      <text:p text:style-name="P45"><draw:custom-shape text:anchor-type="paragraph" draw:z-index="58" draw:name="Zone de texte 2" draw:style-name="gr4" draw:text-style-name="P90" svg:width="0.5004in" svg:height="0.2634in" svg:x="6.3756in" svg:y="0.3917in"><text:p text:style-name="Frame_20_contents">-2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9" draw:name="Zone de texte 2" draw:style-name="gr3" draw:text-style-name="P90" svg:width="0.5303in" svg:height="0.2516in" svg:x="9.9354in" svg:y="0.0201in"><text:p text:style-name="Frame_20_contents">-10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paragraph" draw:z-index="55" draw:name="Connecteur droit 52" draw:style-name="gr6" draw:text-style-name="P91" svg:x1="7.5197in" svg:y1="0.315in" svg:x2="7.5114in" svg:y2="0.7598in"><text:p/></draw:line><draw:line text:anchor-type="paragraph" draw:z-index="56" draw:name="Connecteur droit 51" draw:style-name="gr6" draw:text-style-name="P91" svg:x1="10.3528in" svg:y1="0.3512in" svg:x2="10.3437in" svg:y2="0.7961in"><text:p/></draw:line><draw:frame draw:style-name="fr4" draw:name="Image 50" text:anchor-type="char" svg:x="6.9791in" svg:y="0.3598in" svg:width="3.5102in" svg:height="0.3228in" draw:z-index="55"><draw:image xlink:href="Pictures/10000000000001510000001FDEADA9166A5917FE.png" xlink:type="simple" xlink:show="embed" xlink:actuate="onLoad" draw:mime-type="image/png"/><draw:contour-polygon svg:width="336px" svg:height="29px" svg:viewBox="0 0 336 29" draw:points="0,0 0,29 336,29 336,0" draw:recreate-on-edit="false"/></draw:frame><text:span text:style-name="T14">Dans cette section, nous présenterons les résultats des tests effectués sur le réseau Wi-Fi dans le bâtiment C, à la fois au rez-de-chaussée et au 1er étage, à travers des Heatmaps, en analysant la couverture, la qualité du signal et les débits mesurés.</text:span></text:p>
      <text:p text:style-name="P42"><draw:custom-shape text:anchor-type="paragraph" style:rel-width="40%" style:rel-height="20%" draw:z-index="60" draw:name="Zone de texte 2" draw:style-name="gr2" draw:text-style-name="P90" svg:width="4.3323in" svg:height="0.2516in" svg:x="6.7866in" svg:y="0.1992in"><text:p text:style-name="Frame_20_contents"><text:span text:style-name="T67">Figure 19 : Echelle de l'affaiblissement du signal en dB sur les heatmap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2738796034" text:style-name="WWNum32">
        <text:list-item>
          <text:p text:style-name="P83"><draw:custom-shape text:anchor-type="paragraph" draw:z-index="49" draw:name="Zone de texte 47" draw:style-name="gr8" draw:text-style-name="P90" svg:width="2.5043in" svg:height="0.1823in" svg:x="4.5945in" svg:y="0.4429in"><text:p text:style-name="caption">Figure 21 : Heatmap du Rez-de-chaussé en 5Ghz.</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7">Rez de chaussé :</text:span></text:p>
        </text:list-item>
      </text:list>
      <text:p text:style-name="P85"><draw:custom-shape text:anchor-type="paragraph" draw:z-index="46" draw:name="Zone de texte 46" draw:style-name="gr9" draw:text-style-name="P90" svg:width="2.6606in" svg:height="0.1823in" svg:x="0.7453in" svg:y="0.0516in"><text:p text:style-name="caption">Figure 20 : Heatmap du Rez-de-chaussé en 2.4Ghz.</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 draw:name="Image18" text:anchor-type="char" svg:x="4.1965in" svg:y="0.2425in" svg:width="3.5701in" svg:height="2.1252in" draw:z-index="48"><draw:image xlink:href="Pictures/1000000000000313000001D3B14001C78C262346.jpg" xlink:type="simple" xlink:show="embed" xlink:actuate="onLoad" draw:mime-type="image/jpeg"/><svg:desc>Une image contenant texte, capture d’écran, diagramme, Police

Description générée automatiquement</svg:desc><draw:contour-polygon svg:width="3.5386in" svg:height="2.1079in" svg:viewBox="0 0 8988 5354" draw:points="25,0 25,5354 9013,5354 9013,0" draw:recreate-on-edit="false"/></draw:frame><draw:frame draw:style-name="fr2" draw:name="Image20" text:anchor-type="char" svg:x="0.172in" svg:y="0.2362in" svg:width="3.4953in" svg:height="2.1252in" draw:z-index="46"><draw:image xlink:href="Pictures/1000000000000300000001D4F98357F31F74E668.jpg" xlink:type="simple" xlink:show="embed" xlink:actuate="onLoad" draw:mime-type="image/jpeg"/><draw:contour-polygon svg:width="3.4646in" svg:height="2.1122in" svg:viewBox="0 0 8800 5365" draw:points="25,0 25,5365 8825,5365 8825,0" draw:recreate-on-edit="false"/></draw:frame></text:p>
      <text:p text:style-name="P82"><text:span text:style-name="T37">Au rez-de-chaussée, la couverture Wi-Fi est globalement homogène en 5 GHz, à l'exception de la salle C001 où il n'y a aucune réception. En 2,4 GHz, l'atténuation est plus importante, notamment vers les salles situées à droite de l'entrée, ainsi que vers les toilettes en face de la salle C017. <text:s/>Cependant, la couverture est plus forte vers la salle C014, ce qui est compréhensible étant donné que cette salle abrite la direction. Il est donc logique que le signal soit plus puissant dans cette zone, car elle bénéficie probablement d'une meilleure gestion et d'une optimisation du réseau. Étant donné que nous n'avons pas eu l'occasion de réaliser les mesures dans d'autres salles, nous pouvons supposer que les salles C002 et C008 seront dans des conditions similaires à celles de la salle C001, située juste à côté. Cela implique qu'elles souffriront également d'une couverture Wi-Fi réduite, avec une atténuation plus marquée, notamment en 5 GHz. </text:span></text:p>
      <text:p text:style-name="P36"><text:span text:style-name="T34">Par conséquent, la connexion dans ces zones sera probablement moins stable et moins performante par rapport aux autres zones du rez-de-chaussée, en particulier près de la salle C014, où le signal est plus fort.</text:span></text:p>
      <text:p text:style-name="P50"><draw:frame draw:style-name="fr2" draw:name="Image22" text:anchor-type="char" svg:x="0.139in" svg:y="0.2043in" svg:width="4.2646in" svg:height="3.2083in" draw:z-index="51"><draw:image xlink:href="Pictures/100002010000037B0000029FD05DD9B26C5F00AD.png" xlink:type="simple" xlink:show="embed" xlink:actuate="onLoad" draw:mime-type="image/png"/><svg:desc>https://lh7-rt.googleusercontent.com/docsz/AD_4nXexuSMythqt6swpcq-1CYjCeowOgsp9sR1SMZwtUwZqWzKk5RKeqD2ZZAmQH06gfVp3uE5F1g8sI-P48aymeHq7JaBu2QTFTiVbxzxJ_mtO85w794bOMcW49jIE5ca5n_f-EOc3zg?key=76FF-Krw-BLh9M7WPOQ3XmRz</svg:desc><draw:contour-polygon svg:width="4.026in" svg:height="3.0378in" svg:viewBox="0 0 10226 7716" draw:points="25,0 25,7716 10251,7716 10251,0" draw:recreate-on-edit="false"/></draw:frame><text:soft-page-break/></text:p>
      <text:list xml:id="list1843874770" text:style-name="WWNum12">
        <text:list-item>
          <text:p text:style-name="P84"><draw:frame draw:style-name="fr1" draw:name="Image 14" text:anchor-type="char" svg:x="5.4339in" svg:y="0.3937in" svg:width="4.3638in" svg:height="2.7646in" draw:z-index="53"><draw:image xlink:href="Pictures/100002010000032E00000204F3D0C714D6C2F1D1.png" xlink:type="simple" xlink:show="embed" xlink:actuate="onLoad" draw:mime-type="image/png"/><svg:desc>https://lh7-rt.googleusercontent.com/docsz/AD_4nXeFIoe3qCmS4MODqO3X29pYKLGoYNfguUqmroBAdtOJY-wQ8fDG0WZFRpmherm0xP-D5DwftgyWo6cUFigmM9FDGph8B6ENeZS7hopPstmG1MhW2H0IhKMJ3aa7Cii5QbJAA1fyWg?key=76FF-Krw-BLh9M7WPOQ3XmRz</svg:desc><draw:contour-polygon svg:width="3.6638in" svg:height="2.339in" svg:viewBox="0 0 9306 5941" draw:points="25,0 25,5941 9331,5941 9331,0" draw:recreate-on-edit="false"/></draw:frame><text:span text:style-name="T57">1</text:span><text:span text:style-name="T59">er</text:span><text:span text:style-name="T57"> Etage :</text:span></text:p>
        </text:list-item>
      </text:list>
      <text:p text:style-name="P86"/>
      <text:p text:style-name="P72"/>
      <text:p text:style-name="P74"/>
      <text:p text:style-name="P75"/>
      <text:p text:style-name="P86"/>
      <text:p text:style-name="P73"/>
      <text:p text:style-name="P73"/>
      <text:p text:style-name="P73"><draw:custom-shape text:anchor-type="paragraph" draw:z-index="53" draw:name="Zone de texte 49" draw:style-name="gr7" draw:text-style-name="P90" svg:width="3.1988in" svg:height="0.1516in" svg:x="6.3272in" svg:y="0.0634in"><text:p text:style-name="caption">Figure 23 : Heatmap du 1er étage en 5Ghz.</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1" draw:name="Zone de texte 48" draw:style-name="gr7" draw:text-style-name="P90" svg:width="3.278in" svg:height="0.1516in" svg:x="0.7217in" svg:y="0.0311in"><text:p text:style-name="caption">Figure 22 : Heatmap du 1er étage en 2.4Ghz.</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 text:name="_bookmark37"/><text:bookmark text:name="_bookmark41"/></text:p>
      <text:p text:style-name="P36"><text:span text:style-name="T34">Les zones bien couvertes par les points d'accès (AP) sont clairement indiquées par les zones jaunes, oranges, montrant une couverture optimale. </text:span></text:p>
      <text:p text:style-name="P36"><text:span text:style-name="T34">Toutefois, certaines parties des salles C103 présentent des zones de faible couverture en 2,4 GHz, et une atténuation plus importante a été observée dans la salle C106.</text:span></text:p>
      <text:p text:style-name="P36"><text:span text:style-name="T34">Pour la bande 5 GHz, les zones de forte atténuation se situent principalement aux mêmes endroits qu'en 2,4 GHz, mais les pertes de signal sont beaucoup plus importantes. </text:span></text:p>
      <text:p text:style-name="P36"><text:span text:style-name="T34">En outre, la salle C100 et C104 ont montré une atténuation considérable. Malgré ces pertes, la couverture reste globalement adéquate, chaque salle bénéficiant d'une couverture suffisante en 5 GHz ou en 2,4 GHz dans les zones où l'atténuation est plus importante.</text:span></text:p>
      <text:p text:style-name="P38"/>
      <text:list xml:id="list221212086876242" text:continue-list="list221211508323886" text:style-name="WWNum4">
        <text:list-item>
          <text:p text:style-name="P7"><text:bookmark text:name="_bookmark43"/><text:span text:style-name="T58">Remerciement </text:span></text:p>
        </text:list-item>
      </text:list>
      <text:p text:style-name="P63"/>
      <text:p text:style-name="P44"><text:span text:style-name="T36">Nous tenons à remercier chaleureusement Monsieur Garinet, qui a été d'une grande aide tout au long du projet, même lorsqu'il n'était pas présent. Son soutien et ses conseils ont été précieux. Nous exprimons également notre gratitude envers les professeurs et la direction, qui nous ont permis de réaliser des mesures dans leurs salles, ce qui a été essentiel pour la réussite de ce projet.</text:span></text:p>
      <text:p text:style-name="P39"/>
      <text:list xml:id="list221212028346898" text:continue-numbering="true" text:style-name="WWNum4">
        <text:list-item>
          <text:p text:style-name="P6"><text:span text:style-name="T58">Temps de Travail estimé sur le projet</text:span></text:p>
        </text:list-item>
      </text:list>
      <text:p text:style-name="P44"><text:span text:style-name="T36">Pour finaliser ce projet, nous avons constitué une petite équipe de cinq personnes, travaillant sur un TP Encadré et cinq séances de TP d’autonomie, ce qui nous a permis de consacrer un total de 21 heures à sa réalisation. Parmi ces 21 heures, environ 4 heures ont été consacrées à des ajustements en dehors des horaires de cours.</text:span></text:p>
      <text:list xml:id="list221212498059314" text:continue-numbering="true" text:style-name="WWNum4">
        <text:list-item>
          <text:p text:style-name="P6"><text:span text:style-name="T58">Difficultés rencontrées </text:span></text:p>
        </text:list-item>
      </text:list>
      <text:p text:style-name="P44"><text:span text:style-name="T36">Nous avons rencontré plusieurs difficultés lors de la réalisation de ce projet. L'un des principaux obstacles a été l'accès aux salles de classe, certaines étant fermées, ce qui a compliqué la prise de mesures dans certains espaces. Un autre problème majeur a été l'affichage de la heatmap, qui n'était pas clair au début. Cela a nécessité plusieurs ajustements techniques pour obtenir une représentation précise et lisible des résultats.</text:span></text:p>
      <text:p text:style-name="P77"/>
      <text:list xml:id="list221212322648527" text:continue-numbering="true" text:style-name="WWNum4">
        <text:list-item>
          <text:p text:style-name="P6"><text:span text:style-name="T58">Conclusion</text:span></text:p>
        </text:list-item>
      </text:list>
      <text:p text:style-name="P36"><text:span text:style-name="T34">Ce projet a été une opportunité d’explorer et de maîtriser plusieurs outils essentiels à l’analyse et à la gestion des réseaux Wi-Fi. Grâce à </text:span><text:span text:style-name="Strong"><text:span text:style-name="T43">Packet Tracer</text:span></text:span><text:span text:style-name="T34">, nous avons pu simuler un réseau 802.11a et 802.11b, analyser leur fonctionnement et leur comportement dans différentes configurations. Cet outil nous a permis de mieux comprendre les bases de la conception et de la gestion d’un réseau sans fil.</text:span></text:p>
      <text:p text:style-name="P36"><text:span text:style-name="T34">L’utilisation de </text:span><text:span text:style-name="Strong"><text:span text:style-name="T43">Acrylic Wi-Fi Analyzer</text:span></text:span><text:span text:style-name="T34"> et de </text:span><text:span text:style-name="Strong"><text:span text:style-name="T43">Acrylic Heatmap</text:span></text:span><text:span text:style-name="T34"> a été particulièrement enrichissante. Ces logiciels nous ont aidés à effectuer des mesures détaillées de la couverture du réseau et à identifier les zones de faible performance. Nous avons pu visualiser les signaux à travers des cartographies précises, ce qui nous a permis d’identifier les zones à optimiser et de mieux comprendre l’impact des environnements physiques sur la propagation des ondes Wi-Fi.</text:span></text:p>
      <text:p text:style-name="P36"><text:span text:style-name="T34">Ce projet a également renforcé nos compétences en paramétrage et en gestion des points d’accès (AP), tout en consolidant notre méthodologie d’analyse des performances d’un réseau. Grâce à cette expérience, nous avons acquis des compétences pratiques et théoriques essentielles qui seront utiles pour des projets futurs dans le domaine des réseaux sans fil.</text:span></text:p>
      <text:p text:style-name="P5"><text:bookmark text:name="_bookmark56"/></text:p>
      <text:p text:style-name="P2"/>
      <text:p text:style-name="P3"><text:span text:style-name="T18">Table des illustrations : </text:span></text:p>
      <text:p text:style-name="P1"/>
      <text:illustration-index text:style-name="Sect1" text:protected="true" text:name="Table of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4"><text:span text:style-name="T15">Figure 1 : Schéma de la norme TIA-56………………………………………………………………………………………………………………..…………………..3</text:span></text:p>
          <text:p text:style-name="Standard"/>
          <text:p text:style-name="caption"><text:span text:style-name="T25">Figure 2 : Les différentes étapes de la réalisation du câble Femelle RJ45………………………………………………………………………...…….3</text:span></text:p>
          <text:p text:style-name="caption"><text:span text:style-name="T26">Figure 3 : <text:s/>Les différentes étapes de la réalisation du câble Mâle RJ45……………………………………………………………………………………3</text:span></text:p>
          <text:p text:style-name="caption"><text:span text:style-name="T25">Figure 4 : <text:s/>Le matériel : noyau RJ45, pince à sertir, pince à dénuder, testeur RJ45 (CableMaster 200), câble S/FTP………………..3</text:span></text:p>
          <text:p text:style-name="caption"><text:span text:style-name="T26">Figure 5 : Le schéma de câblage à réaliser (schéma du PowerPoint de présentation de la SAE)………………………………………………3</text:span></text:p>
          <text:p text:style-name="caption"><text:span text:style-name="T25">Figure 6 : Testeur PoE………………………………………………………………………………………………………………………………..……………………………4</text:span></text:p>
          <text:p text:style-name="caption"><text:span text:style-name="T25">Figure 7 : Tableau de comparaison…………………………………………………………………………………………………………………………………………4</text:span></text:p>
          <text:p text:style-name="caption"><text:span text:style-name="T26">Figure 8 : Diagramme de réception en 2.4GHz………………………………………………………………………………………………………………………..5</text:span></text:p>
          <text:p text:style-name="caption"><text:span text:style-name="T26">Figure 9 : Diagramme de réception en 5GHz…………………………………………………………………………………………………………………………..6</text:span></text:p>
          <text:p text:style-name="caption"><text:span text:style-name="T26">Figure 10 : Heatmap de GRA_802.11g………………………………………………………………………………………………………………………………….…7</text:span></text:p>
          <text:p text:style-name="caption"><text:span text:style-name="T26">Figure 11 : Heatmap de GRA_802.11a…………………………………………………………………………………………………………………………………….7</text:span></text:p>
          <text:p text:style-name="caption"><text:span text:style-name="T25">Figure 12 : Graphiques des salles C102, C101 et C001………………………………………………………………………………………………………….…8</text:span></text:p>
          <text:p text:style-name="caption"><text:span text:style-name="T26">Figure 13 : Informations de l'AP sur le contrôleur………………………………………………………………………………………………………………..…9</text:span></text:p>
          <text:p text:style-name="caption"><text:span text:style-name="T25">Figure 14 : Réseau Wi-FI sur Packet Tracer……………………………………………………………………………………………………………………………10</text:span></text:p>
          <text:p text:style-name="caption"><text:span text:style-name="T25">Figure 15 : Le Point d'Accès (AP)……………………………………………………………………………………………………………………………………………10</text:span></text:p>
          <text:p text:style-name="caption"><text:span text:style-name="T25">Figure 16 : Le Wireless……………………………………………………………………………………………………………………………………………………….…10</text:span></text:p>
          <text:p text:style-name="caption"><text:span text:style-name="T25">Figure 17 : Le serveur DNS……………………………………………………………………………………………………………………………………….……………11</text:span></text:p>
          <text:p text:style-name="caption"><text:span text:style-name="T25">Figure 18 : Le serveur DHCP………………………………………………………………………………………………………………………………………….………11</text:span></text:p>
          <text:p text:style-name="Standard">Figure 19 : Echelle de l'affaiblissement du signal en dB sur les heatmaps…………………………………………………………………….…….…12</text:p>
          <text:p text:style-name="Standard"/>
          <text:p text:style-name="caption"><text:span text:style-name="T25">Figure 20 : Heatmap du Rez-de-chaussé en 2.4Ghz………………………………………………………………………………………………………………12</text:span></text:p>
          <text:p text:style-name="caption"><text:span text:style-name="T25">Figure 21 : Heatmap du Rez-de-chaussé en 5Ghz…………………………………………………………………………………………………….……………12</text:span></text:p>
          <text:p text:style-name="caption"><text:span text:style-name="T25">Figure 22 : Heatmap du 1er étage en 2.4Ghz……………………………………………………………………………………………………………………..…13</text:span></text:p>
          <text:p text:style-name="caption"><text:span text:style-name="T25">Figure 23 : Heatmap du 1er étage en 5Ghz……………………………………………………………………………………………………………………………13</text:span></text:p>
        </text:index-body>
      </text:illustration-index>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 svg:font-family="'Lucida Sans'"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Helvetica Neue" svg:font-family="'Helvetica Neue'"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0" fo:widows="0" style:writing-mode="lr-tb"/>
      <style:text-properties style:font-name="Calibri" fo:font-family="Calibri" style:font-family-generic="roman" style:font-pitch="variable" fo:language="fr" fo:country="FR"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1" style:list-style-name="" style:class="text">
      <style:paragraph-properties fo:margin-left="0.5689in" fo:margin-right="0in" fo:margin-top="0.0146in" fo:margin-bottom="0in" style:contextual-spacing="false" fo:text-indent="-0.2492in" style:auto-text-indent="false"/>
      <style:text-properties style:font-name="Calibri Light" fo:font-family="'Calibri Light'" style:font-family-generic="roman" style:font-pitch="variable" fo:font-size="16pt" style:font-name-asian="Calibri Light1" style:font-family-asian="'Calibri Light'" style:font-family-generic-asian="system" style:font-pitch-asian="variable" style:font-size-asian="16pt" style:font-name-complex="Calibri Light1" style:font-family-complex="'Calibri Light'" style:font-family-generic-complex="system" style:font-pitch-complex="variable" style:font-size-complex="16pt"/>
    </style:style>
    <style:style style:name="Heading_20_2" style:display-name="Heading 2" style:family="paragraph" style:parent-style-name="Standard" style:default-outline-level="2" style:list-style-name="" style:class="text">
      <style:paragraph-properties fo:margin-left="0.8098in" fo:margin-right="0in" fo:text-indent="-0.2484in" style:auto-text-indent="false"/>
      <style:text-properties style:font-name="Calibri Light" fo:font-family="'Calibri Light'" style:font-family-generic="roman" style:font-pitch="variable" fo:font-size="13pt" style:font-name-asian="Calibri Light1" style:font-family-asian="'Calibri Light'" style:font-family-generic-asian="system" style:font-pitch-asian="variable" style:font-size-asian="13pt" style:font-name-complex="Calibri Light1" style:font-family-complex="'Calibri Light'" style:font-family-generic-complex="system" style:font-pitch-complex="variable" style:font-size-complex="13pt"/>
    </style:style>
    <style:style style:name="Heading_20_3" style:display-name="Heading 3" style:family="paragraph" style:parent-style-name="Standard" style:default-outline-level="3" style:list-style-name="" style:class="text">
      <style:text-properties style:text-underline-style="solid" style:text-underline-width="auto" style:text-underline-color="#000000" fo:font-weight="bold" style:font-weight-asian="bold" style:font-weight-complex="bold"/>
    </style:style>
    <style:style style:name="Contents_20_1" style:display-name="Contents 1" style:family="paragraph" style:parent-style-name="Standard" style:default-outline-level="" style:class="index">
      <style:paragraph-properties fo:margin-left="0.3744in" fo:margin-right="0in" fo:margin-top="0.0839in" fo:margin-bottom="0in" style:contextual-spacing="false" fo:text-indent="-0.3047in" style:auto-text-indent="false"/>
    </style:style>
    <style:style style:name="Contents_20_2" style:display-name="Contents 2" style:family="paragraph" style:parent-style-name="Standard" style:default-outline-level="" style:class="index">
      <style:paragraph-properties fo:margin-left="0.528in" fo:margin-right="0in" fo:margin-top="0.0835in" fo:margin-bottom="0in" style:contextual-spacing="false" fo:text-indent="-0.3055in" style:auto-text-indent="false"/>
    </style:style>
    <style:style style:name="Title" style:family="paragraph" style:parent-style-name="Standard" style:default-outline-level="" style:class="chapter">
      <style:paragraph-properties fo:margin-left="0.8209in" fo:margin-right="0in" fo:text-indent="0in" style:auto-text-indent="false"/>
      <style:text-properties style:font-name="Calibri Light" fo:font-family="'Calibri Light'" style:font-family-generic="roman" style:font-pitch="variable" fo:font-size="32pt" style:font-name-asian="Calibri Light1" style:font-family-asian="'Calibri Light'" style:font-family-generic-asian="system" style:font-pitch-asian="variable" style:font-size-asian="32pt" style:font-name-complex="Calibri Light1" style:font-family-complex="'Calibri Light'" style:font-family-generic-complex="system" style:font-pitch-complex="variable" style:font-size-complex="32pt"/>
    </style:style>
    <style:style style:name="List_20_Paragraph" style:display-name="List Paragraph" style:family="paragraph" style:parent-style-name="Standard" style:default-outline-level="">
      <style:paragraph-properties fo:margin-left="0.3744in" fo:margin-right="0in" fo:margin-top="0.0146in" fo:margin-bottom="0in" style:contextual-spacing="false" fo:text-indent="-0.2484in" style:auto-text-indent="false"/>
    </style:style>
    <style:style style:name="Table_20_Paragraph" style:display-name="Table Paragraph" style:family="paragraph" style:parent-style-name="Standard" style:default-outline-level="">
      <style:paragraph-properties fo:margin-left="0.0744in" fo:margin-right="0in" fo:line-height="0.172in"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style:contextual-spacing="false" fo:text-indent="0in" style:auto-text-indent="false"/>
    </style:style>
    <style:style style:name="TOC_20_Heading" style:display-name="TOC Heading" style:family="paragraph" style:parent-style-name="Heading_20_1" style:next-style-name="Standard" style:default-outline-level="">
      <style:paragraph-properties fo:margin-left="0in" fo:margin-right="0in" fo:margin-top="0.1665in" fo:margin-bottom="0in" style:contextual-spacing="false" fo:line-height="108%" fo:keep-together="always" fo:orphans="2" fo:widows="2" fo:text-indent="0in" style:auto-text-indent="false" fo:keep-with-next="always"/>
      <style:text-properties fo:color="#365f91" loext:opacity="100%" style:font-name="Cambria" fo:font-family="Cambria" style:font-family-generic="roman" style:font-pitch="variable" style:font-name-asian="F" style:font-family-generic-asian="system" style:font-pitch-asian="variable" style:language-asian="fr" style:country-asian="FR" style:font-name-complex="F"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Normal_20__28_Web_29_" style:display-name="Normal (Web)" style:family="paragraph" style:parent-style-name="Standard" style:default-outline-level="">
      <style:paragraph-properties fo:margin-top="0.1945in" fo:margin-bottom="0.1945in" style:contextual-spacing="false" fo:orphans="2" fo:widows="2"/>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Par_20_défaut" style:display-name="Par défaut" style:family="paragraph" style:default-outline-level="">
      <style:paragraph-properties fo:margin-top="0.111in" fo:margin-bottom="0in" style:contextual-spacing="false" fo:line-height="120%" fo:text-align="start" style:justify-single-word="false" fo:orphans="2" fo:widows="2" fo:padding="0in" fo:border="none" style:shadow="none" style:writing-mode="lr-tb"/>
      <style:text-properties fo:color="#000000" loext:opacity="100%" style:font-name="Helvetica Neue" fo:font-family="'Helvetica Neue'" style:font-family-generic="roman" style:font-pitch="variable" fo:font-size="12pt" fo:language="fr" fo:country="FR" style:font-name-asian="Arial Unicode MS" style:font-family-asian="'Arial Unicode MS'" style:font-family-generic-asian="system" style:font-pitch-asian="variable" style:font-size-asian="12pt" style:language-asian="fr" style:country-asian="FR" style:font-name-complex="Arial Unicode MS" style:font-family-complex="'Arial Unicode MS'" style:font-family-generic-complex="system" style:font-pitch-complex="variable" style:font-size-complex="12pt" loext:padding="0in" loext:border="none" loext:shadow="none"/>
    </style:style>
    <style:style style:name="caption" style:family="paragraph" style:parent-style-name="Standard" style:next-style-name="Standard" style:default-outline-level="">
      <style:paragraph-properties fo:margin-top="0in" fo:margin-bottom="0.139in" style:contextual-spacing="false"/>
      <style:text-properties fo:color="#1f497d" loext:opacity="100%" fo:font-size="9pt" fo:font-style="italic" style:font-size-asian="9pt" style:font-style-asian="italic" style:font-size-complex="9pt" style:font-style-complex="italic"/>
    </style:style>
    <style:style style:name="table_20_of_20_figures" style:display-name="table of figures" style:family="paragraph" style:parent-style-name="Standard" style:next-style-name="Standard" style:default-outline-level=""/>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rame_20_contents" style:display-name="Frame contents" style:family="paragraph" style:parent-style-name="Standard" style:class="extra"/>
    <style:style style:name="Default_20_Paragraph_20_Font" style:display-name="Default Paragraph Font" style:family="text"/>
    <style:style style:name="Titre_20_Car" style:display-name="Titre Car" style:family="text" style:parent-style-name="Default_20_Paragraph_20_Font">
      <style:text-properties style:font-name="Calibri Light" fo:font-family="'Calibri Light'" style:font-family-generic="roman" style:font-pitch="variable" fo:font-size="32pt" fo:language="fr" fo:country="FR" style:font-name-asian="Calibri Light1" style:font-family-asian="'Calibri Light'" style:font-family-generic-asian="system" style:font-pitch-asian="variable" style:font-size-asian="32pt" style:font-name-complex="Calibri Light1" style:font-family-complex="'Calibri Light'" style:font-family-generic-complex="system" style:font-pitch-complex="variable" style:font-size-complex="32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En-tête_20_Car" style:display-name="En-tête Car" style:family="text" style:parent-style-name="Default_20_Paragraph_20_Font">
      <style:text-properties style:font-name="Calibri" fo:font-family="Calibri" style:font-family-generic="roman" style:font-pitch="variable" fo:language="fr" fo:country="FR" style:font-name-asian="Calibri1" style:font-family-asian="Calibri" style:font-family-generic-asian="system" style:font-pitch-asian="variable" style:font-name-complex="Calibri1" style:font-family-complex="Calibri" style:font-family-generic-complex="system" style:font-pitch-complex="variable"/>
    </style:style>
    <style:style style:name="Pied_20_de_20_page_20_Car" style:display-name="Pied de page Car" style:family="text" style:parent-style-name="Default_20_Paragraph_20_Font">
      <style:text-properties style:font-name="Calibri" fo:font-family="Calibri" style:font-family-generic="roman" style:font-pitch="variable" fo:language="fr" fo:country="FR" style:font-name-asian="Calibri1" style:font-family-asian="Calibri" style:font-family-generic-asian="system" style:font-pitch-asian="variable" style:font-name-complex="Calibri1" style:font-family-complex="Calibri" style:font-family-generic-complex="system" style:font-pitch-complex="variable"/>
    </style:style>
    <style:style style:name="Titre_20_1_20_Car" style:display-name="Titre 1 Car" style:family="text" style:parent-style-name="Default_20_Paragraph_20_Font">
      <style:text-properties style:font-name="Calibri Light" fo:font-family="'Calibri Light'" style:font-family-generic="roman" style:font-pitch="variable" fo:font-size="16pt" fo:language="fr" fo:country="FR" style:font-name-asian="Calibri Light1" style:font-family-asian="'Calibri Light'" style:font-family-generic-asian="system" style:font-pitch-asian="variable" style:font-size-asian="16pt" style:font-name-complex="Calibri Light1" style:font-family-complex="'Calibri Light'" style:font-family-generic-complex="system" style:font-pitch-complex="variable" style:font-size-complex="16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style:font-name="Calibri" fo:font-family="Calibri" style:font-family-generic="roman" style:font-pitch="variable" fo:font-size="10pt" fo:language="fr" fo:country="FR" style:font-name-asian="Calibri1" style:font-family-asian="Calibri" style:font-family-generic-asian="system" style:font-pitch-asian="variable" style:font-size-asian="10pt" style:font-name-complex="Calibri1" style:font-family-complex="Calibri" style:font-family-generic-complex="system" style:font-pitch-complex="variable" style:font-size-complex="10pt"/>
    </style:style>
    <style:style style:name="Objet_20_du_20_commentaire_20_Car" style:display-name="Objet du commentaire Car" style:family="text" style:parent-style-name="Commentaire_20_Car">
      <style:text-properties style:font-name="Calibri" fo:font-family="Calibri" style:font-family-generic="roman" style:font-pitch="variable" fo:font-size="10pt" fo:language="fr" fo:country="FR" fo:font-weight="bold" style:font-name-asian="Calibri1" style:font-family-asian="Calibri" style:font-family-generic-asian="system" style:font-pitch-asian="variable" style:font-size-asian="10pt" style:font-weight-asian="bold" style:font-name-complex="Calibri1" style:font-family-complex="Calibri" style:font-family-generic-complex="system" style:font-pitch-complex="variable" style:font-size-complex="10pt" style:font-weight-complex="bold"/>
    </style:style>
    <style:style style:name="Texte_20_de_20_bulles_20_Car" style:display-name="Texte de bulles Car" style:family="text" style:parent-style-name="Default_20_Paragraph_20_Font">
      <style:text-properties style:font-name="Segoe UI" fo:font-family="'Segoe UI'" style:font-family-generic="roman" style:font-pitch="variable" fo:font-size="9pt" fo:language="fr" fo:country="FR" style:font-name-asian="Calibri1" style:font-family-asian="Calibri" style:font-family-generic-asian="system" style:font-pitch-asian="variable"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fo:color="#2e5395" loext:opacity="100%" style:font-name="Calibri Light" fo:font-family="'Calibri Light'" style:font-family-generic="roman" style:font-pitch="variable" fo:font-size="16pt" fo:letter-spacing="-0.0008in" fo:language="fr" fo:country="FR" fo:font-style="normal" fo:font-weight="normal" style:font-name-asian="Calibri Light1" style:font-family-asian="'Calibri Light'" style:font-family-generic-asian="system" style:font-pitch-asian="variable" style:font-size-asian="16pt" style:language-asian="en" style:country-asian="US" style:font-style-asian="normal" style:font-weight-asian="normal" style:font-name-complex="Calibri Light1" style:font-family-complex="'Calibri Light'" style:font-family-generic-complex="system" style:font-pitch-complex="variable" style:font-size-complex="16pt" style:language-complex="ar" style:country-complex="SA" style:font-style-complex="normal" style:font-weight-complex="normal" style:text-scale="99%"/>
    </style:style>
    <style:style style:name="ListLabel_20_2" style:display-name="ListLabel 2" style:family="text">
      <style:text-properties fo:letter-spacing="normal" fo:language="fr" fo:country="FR" style:language-asian="en" style:country-asian="US" style:language-complex="ar" style:country-complex="SA" style:text-scale="99%"/>
    </style:style>
    <style:style style:name="ListLabel_20_3" style:display-name="ListLabel 3" style:family="text">
      <style:text-properties fo:color="#8eaadb" loext:opacity="100%" style:font-name="Calibri" fo:font-family="Calibri" style:font-family-generic="roman" style:font-pitch="variable" fo:font-size="11pt" fo:letter-spacing="-0.0008in" fo:language="fr" fo:country="FR" fo:font-style="normal" fo:font-weight="normal" style:font-name-asian="Calibri1" style:font-family-asian="Calibri" style:font-family-generic-asian="system" style:font-pitch-asian="variable" style:font-size-asian="11pt" style:language-asian="en" style:country-asian="US" style:font-style-asian="normal" style:font-weight-asian="normal" style:font-name-complex="Calibri1" style:font-family-complex="Calibri" style:font-family-generic-complex="system" style:font-pitch-complex="variable" style:font-size-complex="11pt" style:language-complex="ar" style:country-complex="SA" style:font-style-complex="normal" style:font-weight-complex="normal" style:text-scale="100%"/>
    </style:style>
    <style:style style:name="ListLabel_20_4" style:display-name="ListLabel 4" style:family="text">
      <style:text-properties fo:language="fr" fo:country="FR" style:language-asian="en" style:country-asian="US" style:language-complex="ar" style:country-complex="SA"/>
    </style:style>
    <style:style style:name="ListLabel_20_5" style:display-name="ListLabel 5" style:family="text">
      <style:text-properties fo:language="fr" fo:country="FR" style:language-asian="en" style:country-asian="US" style:language-complex="ar" style:country-complex="SA"/>
    </style:style>
    <style:style style:name="ListLabel_20_6" style:display-name="ListLabel 6" style:family="text">
      <style:text-properties fo:language="fr" fo:country="FR" style:language-asian="en" style:country-asian="US" style:language-complex="ar" style:country-complex="SA"/>
    </style:style>
    <style:style style:name="ListLabel_20_7" style:display-name="ListLabel 7" style:family="text">
      <style:text-properties fo:language="fr" fo:country="FR" style:language-asian="en" style:country-asian="US" style:language-complex="ar" style:country-complex="SA"/>
    </style:style>
    <style:style style:name="ListLabel_20_8" style:display-name="ListLabel 8" style:family="text">
      <style:text-properties fo:language="fr" fo:country="FR" style:language-asian="en" style:country-asian="US" style:language-complex="ar" style:country-complex="SA"/>
    </style:style>
    <style:style style:name="ListLabel_20_9" style:display-name="ListLabel 9" style:family="text">
      <style:text-properties fo:language="fr" fo:country="FR" style:language-asian="en" style:country-asian="US" style:language-complex="ar" style:country-complex="SA"/>
    </style:style>
    <style:style style:name="ListLabel_20_10" style:display-name="ListLabel 10" style:family="text">
      <style:text-properties style:font-name="Calibri" fo:font-family="Calibri" style:font-family-generic="roman" style:font-pitch="variable" fo:font-size="11pt" fo:letter-spacing="normal" fo:language="fr" fo:country="FR" fo:font-style="normal" fo:font-weight="normal" style:font-name-asian="Calibri1" style:font-family-asian="Calibri" style:font-family-generic-asian="system" style:font-pitch-asian="variable" style:font-size-asian="11pt" style:language-asian="en" style:country-asian="US" style:font-style-asian="normal" style:font-weight-asian="normal" style:font-name-complex="Calibri1" style:font-family-complex="Calibri" style:font-family-generic-complex="system" style:font-pitch-complex="variable" style:font-size-complex="11pt" style:language-complex="ar" style:country-complex="SA" style:font-style-complex="normal" style:font-weight-complex="normal" style:text-scale="100%"/>
    </style:style>
    <style:style style:name="ListLabel_20_11" style:display-name="ListLabel 11" style:family="text">
      <style:text-properties style:font-name="Calibri" fo:font-family="Calibri" style:font-family-generic="roman" style:font-pitch="variable" fo:font-size="11pt" fo:letter-spacing="-0.0008in" fo:language="fr" fo:country="FR" fo:font-style="normal" fo:font-weight="normal" style:font-name-asian="Calibri1" style:font-family-asian="Calibri" style:font-family-generic-asian="system" style:font-pitch-asian="variable" style:font-size-asian="11pt" style:language-asian="en" style:country-asian="US" style:font-style-asian="normal" style:font-weight-asian="normal" style:font-name-complex="Calibri1" style:font-family-complex="Calibri" style:font-family-generic-complex="system" style:font-pitch-complex="variable" style:font-size-complex="11pt" style:language-complex="ar" style:country-complex="SA" style:font-style-complex="normal" style:font-weight-complex="normal" style:text-scale="100%"/>
    </style:style>
    <style:style style:name="ListLabel_20_12" style:display-name="ListLabel 12" style:family="text">
      <style:text-properties fo:language="fr" fo:country="FR" style:language-asian="en" style:country-asian="US" style:language-complex="ar" style:country-complex="SA"/>
    </style:style>
    <style:style style:name="ListLabel_20_13" style:display-name="ListLabel 13" style:family="text">
      <style:text-properties fo:language="fr" fo:country="FR" style:language-asian="en" style:country-asian="US" style:language-complex="ar" style:country-complex="SA"/>
    </style:style>
    <style:style style:name="ListLabel_20_14" style:display-name="ListLabel 14" style:family="text">
      <style:text-properties fo:language="fr" fo:country="FR" style:language-asian="en" style:country-asian="US" style:language-complex="ar" style:country-complex="SA"/>
    </style:style>
    <style:style style:name="ListLabel_20_15" style:display-name="ListLabel 15" style:family="text">
      <style:text-properties fo:language="fr" fo:country="FR" style:language-asian="en" style:country-asian="US" style:language-complex="ar" style:country-complex="SA"/>
    </style:style>
    <style:style style:name="ListLabel_20_16" style:display-name="ListLabel 16" style:family="text">
      <style:text-properties fo:language="fr" fo:country="FR" style:language-asian="en" style:country-asian="US" style:language-complex="ar" style:country-complex="SA"/>
    </style:style>
    <style:style style:name="ListLabel_20_17" style:display-name="ListLabel 17" style:family="text">
      <style:text-properties fo:language="fr" fo:country="FR" style:language-asian="en" style:country-asian="US" style:language-complex="ar" style:country-complex="SA"/>
    </style:style>
    <style:style style:name="ListLabel_20_18" style:display-name="ListLabel 18" style:family="text">
      <style:text-properties fo:language="fr" fo:country="FR" style:language-asian="en" style:country-asian="US" style:language-complex="ar" style:country-complex="SA"/>
    </style:style>
    <style:style style:name="ListLabel_20_19" style:display-name="ListLabel 19" style:family="text">
      <style:text-properties style:font-name="Calibri" fo:font-family="Calibri" style:font-family-generic="roman" style:font-pitch="variable" fo:font-size="10pt" fo:letter-spacing="-0.0008in" fo:language="fr" fo:country="FR" fo:font-weight="bold" style:font-name-asian="Calibri1" style:font-family-asian="Calibri" style:font-family-generic-asian="system" style:font-pitch-asian="variable" style:font-size-asian="10pt" style:language-asian="en" style:country-asian="US" style:font-weight-asian="bold" style:font-name-complex="Calibri1" style:font-family-complex="Calibri" style:font-family-generic-complex="system" style:font-pitch-complex="variable" style:font-size-complex="10pt" style:language-complex="ar" style:country-complex="SA" style:font-weight-complex="bold" style:text-scale="99%"/>
    </style:style>
    <style:style style:name="ListLabel_20_20" style:display-name="ListLabel 20" style:family="text">
      <style:text-properties style:font-name="Calibri" fo:font-family="Calibri" style:font-family-generic="roman" style:font-pitch="variable" fo:font-size="10pt" fo:letter-spacing="-0.0008in" fo:language="fr" fo:country="FR" style:font-name-asian="Calibri1" style:font-family-asian="Calibri" style:font-family-generic-asian="system" style:font-pitch-asian="variable" style:font-size-asian="10pt" style:language-asian="en" style:country-asian="US" style:font-name-complex="Calibri1" style:font-family-complex="Calibri" style:font-family-generic-complex="system" style:font-pitch-complex="variable" style:font-size-complex="10pt" style:language-complex="ar" style:country-complex="SA" style:text-scale="99%"/>
    </style:style>
    <style:style style:name="ListLabel_20_21" style:display-name="ListLabel 21" style:family="text">
      <style:text-properties fo:language="fr" fo:country="FR" style:language-asian="en" style:country-asian="US" style:language-complex="ar" style:country-complex="SA"/>
    </style:style>
    <style:style style:name="ListLabel_20_22" style:display-name="ListLabel 22" style:family="text">
      <style:text-properties fo:language="fr" fo:country="FR" style:language-asian="en" style:country-asian="US" style:language-complex="ar" style:country-complex="SA"/>
    </style:style>
    <style:style style:name="ListLabel_20_23" style:display-name="ListLabel 23" style:family="text">
      <style:text-properties fo:language="fr" fo:country="FR" style:language-asian="en" style:country-asian="US" style:language-complex="ar" style:country-complex="SA"/>
    </style:style>
    <style:style style:name="ListLabel_20_24" style:display-name="ListLabel 24" style:family="text">
      <style:text-properties fo:language="fr" fo:country="FR" style:language-asian="en" style:country-asian="US" style:language-complex="ar" style:country-complex="SA"/>
    </style:style>
    <style:style style:name="ListLabel_20_25" style:display-name="ListLabel 25" style:family="text">
      <style:text-properties fo:language="fr" fo:country="FR" style:language-asian="en" style:country-asian="US" style:language-complex="ar" style:country-complex="SA"/>
    </style:style>
    <style:style style:name="ListLabel_20_26" style:display-name="ListLabel 26" style:family="text">
      <style:text-properties fo:language="fr" fo:country="FR" style:language-asian="en" style:country-asian="US" style:language-complex="ar" style:country-complex="SA"/>
    </style:style>
    <style:style style:name="ListLabel_20_27" style:display-name="ListLabel 27" style:family="text">
      <style:text-properties fo:language="fr" fo:country="FR" style:language-asian="en" style:country-asian="US" style:language-complex="ar" style:country-complex="SA"/>
    </style:style>
    <style:style style:name="ListLabel_20_28" style:display-name="ListLabel 28" style:family="text">
      <style:text-properties fo:color="#e36c0a" loext:opacity="100%" fo:font-size="16pt" style:font-size-asian="16pt"/>
    </style:style>
    <style:style style:name="ListLabel_20_29" style:display-name="ListLabel 29" style:family="text">
      <style:text-properties fo:color="#2e5395" loext:opacity="100%"/>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4pt" style:font-size-asian="14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color="#222222" loext:opacity="100%" fo:font-size="12pt" style:font-name-asian="Calibri1" style:font-family-asian="Calibri" style:font-family-generic-asian="system" style:font-pitch-asian="variable" style:font-size-asian="12pt" style:font-name-complex="Arial1" style:font-family-complex="Arial" style:font-family-generic-complex="system" style:font-pitch-complex="variable"/>
    </style:style>
    <style:style style:name="ListLabel_20_49" style:display-name="ListLabel 49" style:family="text">
      <style:text-properties fo:font-size="14pt" style:font-size-asian="14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4pt" style:font-size-asian="14pt"/>
    </style:style>
    <style:style style:name="ListLabel_20_60" style:display-name="ListLabel 60" style:family="text">
      <style:text-properties fo:font-size="10pt" style:font-size-asian="10pt"/>
    </style:style>
    <style:style style:name="ListLabel_20_61" style:display-name="ListLabel 61" style:family="text">
      <style:text-properties fo:font-size="16pt" style:font-size-asian="16pt"/>
    </style:style>
    <style:style style:name="ListLabel_20_62" style:display-name="ListLabel 62" style:family="text">
      <style:text-properties fo:font-size="16pt" style:font-size-asian="16pt"/>
    </style:style>
    <style:style style:name="ListLabel_20_63" style:display-name="ListLabel 63" style:family="text">
      <style:text-properties fo:font-weight="bold" style:font-weight-asian="bold"/>
    </style:style>
    <style:style style:name="ListLabel_20_64" style:display-name="ListLabel 64" style:family="text">
      <style:text-properties fo:color="#e36c0a" loext:opacity="100%" style:font-name="Calibri" fo:font-family="Calibri" style:font-family-generic="roman" style:font-pitch="variable" fo:font-size="16pt" style:text-underline-style="solid" style:text-underline-width="auto" style:text-underline-color="font-color" style:font-size-asian="16pt" style:font-name-complex="Calibri1" style:font-family-complex="Calibri" style:font-family-generic-complex="system" style:font-pitch-complex="variable"/>
    </style:style>
    <style:style style:name="ListLabel_20_65" style:display-name="ListLabel 65" style:family="text">
      <style:text-properties fo:color="#e36c0a" loext:opacity="100%"/>
    </style:style>
    <style:style style:name="ListLabel_20_66" style:display-name="ListLabel 66" style:family="text">
      <style:text-properties fo:color="#e36c0a" loext:opacity="100%" fo:font-size="16pt" style:font-size-asian="16pt"/>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2508in" fo:margin-left="0.5693in"/>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25in" fo:margin-left="0.811in"/>
        </style:list-level-properties>
      </text:list-level-style-number>
      <text:list-level-style-number text:level="3" text:style-name="ListLabel_20_3" style:num-format="a" style:num-letter-sync="true" text:display-levels="2">
        <style:list-level-properties text:list-level-position-and-space-mode="label-alignment">
          <style:list-level-label-alignment text:label-followed-by="listtab" fo:text-indent="-0.25in" fo:margin-left="1.061in"/>
        </style:list-level-properties>
      </text:list-level-style-number>
      <text:list-level-style-bullet text:level="4" text:style-name="ListLabel_20_4" text:bullet-char="•">
        <style:list-level-properties text:list-level-position-and-space-mode="label-alignment">
          <style:list-level-label-alignment text:label-followed-by="listtab" fo:text-indent="-0.25in" fo:margin-left="1.889in"/>
        </style:list-level-properties>
      </text:list-level-style-bullet>
      <text:list-level-style-bullet text:level="5" text:style-name="ListLabel_20_5" text:bullet-char="•">
        <style:list-level-properties text:list-level-position-and-space-mode="label-alignment">
          <style:list-level-label-alignment text:label-followed-by="listtab" fo:text-indent="-0.25in" fo:margin-left="2.7228in"/>
        </style:list-level-properties>
      </text:list-level-style-bullet>
      <text:list-level-style-bullet text:level="6" text:style-name="ListLabel_20_6" text:bullet-char="•">
        <style:list-level-properties text:list-level-position-and-space-mode="label-alignment">
          <style:list-level-label-alignment text:label-followed-by="listtab" fo:text-indent="-0.25in" fo:margin-left="3.5571in"/>
        </style:list-level-properties>
      </text:list-level-style-bullet>
      <text:list-level-style-bullet text:level="7" text:style-name="ListLabel_20_7" text:bullet-char="•">
        <style:list-level-properties text:list-level-position-and-space-mode="label-alignment">
          <style:list-level-label-alignment text:label-followed-by="listtab" fo:text-indent="-0.25in" fo:margin-left="4.3909in"/>
        </style:list-level-properties>
      </text:list-level-style-bullet>
      <text:list-level-style-bullet text:level="8" text:style-name="ListLabel_20_8" text:bullet-char="•">
        <style:list-level-properties text:list-level-position-and-space-mode="label-alignment">
          <style:list-level-label-alignment text:label-followed-by="listtab" fo:text-indent="-0.25in" fo:margin-left="5.2252in"/>
        </style:list-level-properties>
      </text:list-level-style-bullet>
      <text:list-level-style-bullet text:level="9" text:style-name="ListLabel_20_9" text:bullet-char="•">
        <style:list-level-properties text:list-level-position-and-space-mode="label-alignment">
          <style:list-level-label-alignment text:label-followed-by="listtab" fo:text-indent="-0.25in" fo:margin-left="6.058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fo:text-indent="-0.3055in" fo:margin-left="0.3744in"/>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fo:text-indent="-0.3055in" fo:margin-left="0.528in"/>
        </style:list-level-properties>
      </text:list-level-style-number>
      <text:list-level-style-bullet text:level="3" text:style-name="ListLabel_20_12" text:bullet-char="•">
        <style:list-level-properties text:list-level-position-and-space-mode="label-alignment">
          <style:list-level-label-alignment text:label-followed-by="listtab" fo:text-indent="-0.3055in" fo:margin-left="1.3272in"/>
        </style:list-level-properties>
      </text:list-level-style-bullet>
      <text:list-level-style-bullet text:level="4" text:style-name="ListLabel_20_13" text:bullet-char="•">
        <style:list-level-properties text:list-level-position-and-space-mode="label-alignment">
          <style:list-level-label-alignment text:label-followed-by="listtab" fo:text-indent="-0.3055in" fo:margin-left="2.1272in"/>
        </style:list-level-properties>
      </text:list-level-style-bullet>
      <text:list-level-style-bullet text:level="5" text:style-name="ListLabel_20_14" text:bullet-char="•">
        <style:list-level-properties text:list-level-position-and-space-mode="label-alignment">
          <style:list-level-label-alignment text:label-followed-by="listtab" fo:text-indent="-0.3055in" fo:margin-left="2.9272in"/>
        </style:list-level-properties>
      </text:list-level-style-bullet>
      <text:list-level-style-bullet text:level="6" text:style-name="ListLabel_20_15" text:bullet-char="•">
        <style:list-level-properties text:list-level-position-and-space-mode="label-alignment">
          <style:list-level-label-alignment text:label-followed-by="listtab" fo:text-indent="-0.3055in" fo:margin-left="3.7272in"/>
        </style:list-level-properties>
      </text:list-level-style-bullet>
      <text:list-level-style-bullet text:level="7" text:style-name="ListLabel_20_16" text:bullet-char="•">
        <style:list-level-properties text:list-level-position-and-space-mode="label-alignment">
          <style:list-level-label-alignment text:label-followed-by="listtab" fo:text-indent="-0.3055in" fo:margin-left="4.5272in"/>
        </style:list-level-properties>
      </text:list-level-style-bullet>
      <text:list-level-style-bullet text:level="8" text:style-name="ListLabel_20_17" text:bullet-char="•">
        <style:list-level-properties text:list-level-position-and-space-mode="label-alignment">
          <style:list-level-label-alignment text:label-followed-by="listtab" fo:text-indent="-0.3055in" fo:margin-left="5.3264in"/>
        </style:list-level-properties>
      </text:list-level-style-bullet>
      <text:list-level-style-bullet text:level="9" text:style-name="ListLabel_20_18" text:bullet-char="•">
        <style:list-level-properties text:list-level-position-and-space-mode="label-alignment">
          <style:list-level-label-alignment text:label-followed-by="listtab" fo:text-indent="-0.3055in" fo:margin-left="6.1264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format="I">
        <style:list-level-properties text:list-level-position-and-space-mode="label-alignment">
          <style:list-level-label-alignment text:label-followed-by="listtab" fo:text-indent="-0.3055in" fo:margin-left="0.5244in"/>
        </style:list-level-properties>
      </text:list-level-style-number>
      <text:list-level-style-number text:level="2" text:style-name="ListLabel_20_20" style:num-format="1" text:display-levels="2">
        <style:list-level-properties text:list-level-position-and-space-mode="label-alignment">
          <style:list-level-label-alignment text:label-followed-by="listtab" fo:text-indent="-0.3055in" fo:margin-left="0.678in"/>
        </style:list-level-properties>
      </text:list-level-style-number>
      <text:list-level-style-bullet text:level="3" text:style-name="ListLabel_20_21" text:bullet-char="•">
        <style:list-level-properties text:list-level-position-and-space-mode="label-alignment">
          <style:list-level-label-alignment text:label-followed-by="listtab" fo:text-indent="-0.3055in" fo:margin-left="1.3535in"/>
        </style:list-level-properties>
      </text:list-level-style-bullet>
      <text:list-level-style-bullet text:level="4" text:style-name="ListLabel_20_22" text:bullet-char="•">
        <style:list-level-properties text:list-level-position-and-space-mode="label-alignment">
          <style:list-level-label-alignment text:label-followed-by="listtab" fo:text-indent="-0.3055in" fo:margin-left="2.0272in"/>
        </style:list-level-properties>
      </text:list-level-style-bullet>
      <text:list-level-style-bullet text:level="5" text:style-name="ListLabel_20_23" text:bullet-char="•">
        <style:list-level-properties text:list-level-position-and-space-mode="label-alignment">
          <style:list-level-label-alignment text:label-followed-by="listtab" fo:text-indent="-0.3055in" fo:margin-left="2.7in"/>
        </style:list-level-properties>
      </text:list-level-style-bullet>
      <text:list-level-style-bullet text:level="6" text:style-name="ListLabel_20_24" text:bullet-char="•">
        <style:list-level-properties text:list-level-position-and-space-mode="label-alignment">
          <style:list-level-label-alignment text:label-followed-by="listtab" fo:text-indent="-0.3055in" fo:margin-left="3.3736in"/>
        </style:list-level-properties>
      </text:list-level-style-bullet>
      <text:list-level-style-bullet text:level="7" text:style-name="ListLabel_20_25" text:bullet-char="•">
        <style:list-level-properties text:list-level-position-and-space-mode="label-alignment">
          <style:list-level-label-alignment text:label-followed-by="listtab" fo:text-indent="-0.3055in" fo:margin-left="4.0472in"/>
        </style:list-level-properties>
      </text:list-level-style-bullet>
      <text:list-level-style-bullet text:level="8" text:style-name="ListLabel_20_26" text:bullet-char="•">
        <style:list-level-properties text:list-level-position-and-space-mode="label-alignment">
          <style:list-level-label-alignment text:label-followed-by="listtab" fo:text-indent="-0.3055in" fo:margin-left="4.7201in"/>
        </style:list-level-properties>
      </text:list-level-style-bullet>
      <text:list-level-style-bullet text:level="9" text:style-name="ListLabel_20_27" text:bullet-char="•">
        <style:list-level-properties text:list-level-position-and-space-mode="label-alignment">
          <style:list-level-label-alignment text:label-followed-by="listtab" fo:text-indent="-0.3055in" fo:margin-left="5.393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format="I">
        <style:list-level-properties text:list-level-position-and-space-mode="label-alignment">
          <style:list-level-label-alignment text:label-followed-by="listtab" fo:text-indent="-0.5in" fo:margin-left="0.5984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8484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3484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8484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3484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8484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3484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848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348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1.0598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5598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2.0598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5598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3.0598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5598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4.0598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5598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5.0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1.0689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5689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2.0689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5689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3.0689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5689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4.0689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5689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5.06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1.0689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5689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2.0689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5689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3.0689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5689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4.0689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5689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5.06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25in" fo:margin-left="1.0689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5689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2.0689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5689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3.0689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5689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4.0689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5689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5.06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29" style:num-format="I">
        <style:list-level-properties text:list-level-position-and-space-mode="label-alignment">
          <style:list-level-label-alignment text:label-followed-by="listtab" fo:text-indent="-0.5in" fo:margin-left="0.8189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0689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689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0689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689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0689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689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0689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6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25in" fo:margin-left="0.5693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0693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693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0693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693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069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693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0693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69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0693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693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0693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693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069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693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0693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69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a" style:num-letter-sync="true">
        <style:list-level-properties text:list-level-position-and-space-mode="label-alignment">
          <style:list-level-label-alignment text:label-followed-by="listtab" fo:text-indent="-0.25in" fo:margin-left="0.446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6299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1299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6299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1299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6299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1299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6299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129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a" style:num-letter-sync="true">
        <style:list-level-properties text:list-level-position-and-space-mode="label-alignment">
          <style:list-level-label-alignment text:label-followed-by="listtab" fo:text-indent="-0.25in" fo:margin-left="0.446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946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446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946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446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946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446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946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44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3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3"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4"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5"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6"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7"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8"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39"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ListLabel_20_40" style:num-format="1" text:display-levels="2">
        <style:list-level-properties text:list-level-position-and-space-mode="label-alignment">
          <style:list-level-label-alignment text:label-followed-by="listtab" fo:text-indent="-0.25in" fo:margin-left="1in"/>
        </style:list-level-properties>
      </text:list-level-style-number>
      <text:list-level-style-bullet text:level="3" text:style-name="ListLabel_20_41"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3"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4"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5"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6"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7"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48" style:num-format="1">
        <style:list-level-properties text:list-level-position-and-space-mode="label-alignment">
          <style:list-level-label-alignment text:label-followed-by="listtab" fo:text-indent="-0.25in" fo:margin-left="0.3484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8484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3484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8484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3484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8484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3484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848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348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25in" fo:margin-left="0.5693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0693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693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0693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693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069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693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0693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69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a" style:num-letter-sync="true">
        <style:list-level-properties text:list-level-position-and-space-mode="label-alignment">
          <style:list-level-label-alignment text:label-followed-by="listtab" fo:text-indent="-0.25in" fo:margin-left="0.8193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3193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8193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3193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8193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319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8193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3193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819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format="a" style:num-letter-sync="true">
        <style:list-level-properties text:list-level-position-and-space-mode="label-alignment">
          <style:list-level-label-alignment text:label-followed-by="listtab" fo:text-indent="-0.25in" fo:margin-left="0.939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439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939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439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939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439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939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439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9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49" style:num-format="1">
        <style:list-level-properties text:list-level-position-and-space-mode="label-alignment">
          <style:list-level-label-alignment text:label-followed-by="listtab" fo:text-indent="-0.25in" fo:margin-left="1.0693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5693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2.0693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5693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3.0693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569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4.0693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5693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5.069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5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5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53"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4"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55"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56"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57"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58"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59" style:num-format="1">
        <style:list-level-properties text:list-level-position-and-space-mode="label-alignment">
          <style:list-level-label-alignment text:label-followed-by="listtab" fo:text-indent="-0.25in" fo:margin-left="1.0693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5693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2.0693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5693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3.0693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569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4.0693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5693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5.069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60"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61" style:num-format="1">
        <style:list-level-properties text:list-level-position-and-space-mode="label-alignment">
          <style:list-level-label-alignment text:label-followed-by="listtab" fo:text-indent="-0.25in" fo:margin-left="1.3098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8098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2.3098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8098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3.3098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8098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4.3098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8098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5.30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62"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63" style:num-format="I">
        <style:list-level-properties text:list-level-position-and-space-mode="label-alignment">
          <style:list-level-label-alignment text:label-followed-by="listtab" fo:text-indent="-0.5in" fo:margin-left="0.5693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8193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3193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8193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3193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819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3193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8193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319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64" style:num-format="I">
        <style:list-level-properties text:list-level-position-and-space-mode="label-alignment">
          <style:list-level-label-alignment text:label-followed-by="listtab" fo:text-indent="-0.5in" fo:margin-left="0.5693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8193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3193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8193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3193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819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3193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8193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319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65" style:num-format="I">
        <style:list-level-properties text:list-level-position-and-space-mode="label-alignment">
          <style:list-level-label-alignment text:label-followed-by="listtab" fo:text-indent="-0.5in" fo:margin-left="0.5984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8484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3484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8484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3484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8484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3484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848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348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66" style:num-format="I">
        <style:list-level-properties text:list-level-position-and-space-mode="label-alignment">
          <style:list-level-label-alignment text:label-followed-by="listtab" fo:text-indent="-0.5in" fo:margin-left="0.5984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8484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3484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8484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3484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8484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3484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848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348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style:tab-stops>
          <style:tab-stop style:position="2.6252in"/>
          <style:tab-stop style:position="3.15in" style:type="center"/>
          <style:tab-stop style:position="6.3in" style:type="right"/>
          <style:tab-stop style:position="7.7311in" style:type="right"/>
        </style:tab-stops>
      </style:paragraph-properties>
    </style:style>
    <style:style style:name="MT1" style:family="text">
      <style:text-properties fo:font-size="12pt" fo:font-weight="bold" style:font-size-asian="12pt" style:font-weight-asian="bold" style:font-size-complex="12pt" style:font-weight-complex="bold"/>
    </style:style>
    <style:page-layout style:name="Mpm1">
      <style:page-layout-properties fo:page-width="8.2681in" fo:page-height="11.6929in" style:num-format="1" style:print-orientation="portrait" fo:margin-top="0.5in" fo:margin-bottom="0.1945in" fo:margin-left="0.4307in" fo:margin-right="0.1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8335in" fo:margin-left="0in" fo:margin-right="0in" fo:margin-bottom="0.7937in" style:dynamic-spacing="true"/>
      </style:header-style>
      <style:footer-style/>
    </style:page-layout>
    <style:page-layout style:name="Mpm2">
      <style:page-layout-properties fo:page-width="8.2681in" fo:page-height="11.6929in" style:num-format="1" style:print-orientation="portrait" fo:margin-top="1.3335in" fo:margin-bottom="0.1945in" fo:margin-left="0.4307in" fo:margin-right="0.1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in" fo:margin-bottom="0.2429in" fo:margin-left="0.4307in" fo:margin-right="0.111in" style:writing-mode="lr-tb" style:layout-grid-color="#c0c0c0" style:layout-grid-lines="2751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62in" fo:margin-left="0in" fo:margin-right="0in" fo:margin-bottom="0.4465in" style:dynamic-spacing="true"/>
      </style:header-style>
      <style:footer-style>
        <style:header-footer-properties fo:min-height="0.1319in" fo:margin-left="0in" fo:margin-right="0in" fo:margin-top="0.0929in" style:dynamic-spacing="true"/>
      </style:footer-style>
    </style:page-layout>
    <style:page-layout style:name="Mpm4">
      <style:page-layout-properties fo:page-width="11.6929in" fo:page-height="8.2681in" style:num-format="1" style:print-orientation="landscape" fo:margin-top="0in" fo:margin-bottom="0.2429in" fo:margin-left="0.3752in" fo:margin-right="0.4862in" style:writing-mode="lr-tb" style:layout-grid-color="#c0c0c0" style:layout-grid-lines="37" style:layout-grid-base-height="0.207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307in" fo:margin-left="0in" fo:margin-right="0in" fo:margin-bottom="0.3917in" style:dynamic-spacing="true"/>
      </style:header-style>
      <style:footer-style>
        <style:header-footer-properties fo:min-height="0.0398in" fo:margin-left="0in" fo:margin-right="0in" fo:margin-top="0in" style:dynamic-spacing="true"/>
      </style:footer-style>
    </style:page-layout>
    <style:page-layout style:name="Mpm5">
      <style:page-layout-properties fo:page-width="8.2681in" fo:page-height="11.6929in" style:num-format="1" style:print-orientation="portrait" fo:margin-top="0in" fo:margin-bottom="0.2429in" fo:margin-left="0.4307in" fo:margin-right="0.111in" style:writing-mode="lr-tb" style:layout-grid-color="#c0c0c0" style:layout-grid-lines="2761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445in" fo:margin-left="0in" fo:margin-right="0in" fo:margin-bottom="0.4047in" style:dynamic-spacing="true"/>
      </style:header-style>
      <style:footer-style>
        <style:header-footer-properties fo:min-height="0.1319in" fo:margin-left="0in" fo:margin-right="0in" fo:margin-top="0.0929in" style:dynamic-spacing="true"/>
      </style:footer-style>
    </style:page-layout>
    <style:page-layout style:name="Mpm6">
      <style:page-layout-properties fo:page-width="8.2681in" fo:page-height="11.6929in" style:num-format="1" style:print-orientation="portrait" fo:margin-top="0in" fo:margin-bottom="0.2429in" fo:margin-left="0.4307in" fo:margin-right="0.111in" style:writing-mode="lr-tb" style:layout-grid-color="#c0c0c0" style:layout-grid-lines="2754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72in" fo:margin-left="0in" fo:margin-right="0in" fo:margin-bottom="0.4327in" style:dynamic-spacing="true"/>
      </style:header-style>
      <style:footer-style>
        <style:header-footer-properties fo:min-height="0.1319in" fo:margin-left="0in" fo:margin-right="0in" fo:margin-top="0.0929in" style:dynamic-spacing="true"/>
      </style:footer-style>
    </style:page-layout>
  </office:automatic-styles>
  <office:master-styles>
    <style:master-page style:name="Standard" style:page-layout-name="Mpm1">
      <style:header>
        <text:p text:style-name="MP1"/>
        <text:p text:style-name="MP1">Compte-rendu des travaux SAE13 2024</text:p>
      </style:header>
    </style:master-page>
    <style:master-page style:name="First_20_Page" style:display-name="First Page" style:page-layout-name="Mpm2" style:next-style-name="Standard"/>
    <style:master-page style:name="Converted1" style:page-layout-name="Mpm3">
      <style:header>
        <text:p text:style-name="MP1"/>
        <text:p text:style-name="MP1">Compte-rendu des travaux SAE13 2024</text:p>
      </style:header>
      <style:footer>
        <text:p text:style-name="MP2">12/12/2024<text:tab/><text:tab/><text:tab/><text:tab/>Page <text:span text:style-name="MT1"><text:page-number text:select-page="current">12</text:page-number></text:span><text:s/>sur <text:span text:style-name="MT1"><text:page-count>16</text:page-count></text:span></text:p>
      </style:footer>
    </style:master-page>
    <style:master-page style:name="Converted2" style:page-layout-name="Mpm4">
      <style:header>
        <text:p text:style-name="MP1"/>
        <text:p text:style-name="MP1">Compte-rendu des travaux SAE13 2024</text:p>
      </style:header>
      <style:footer>
        <text:p text:style-name="MP2">12/12/2024<text:tab/><text:tab/><text:tab/><text:tab/>Page <text:span text:style-name="MT1"><text:page-number text:select-page="current">14</text:page-number></text:span><text:s/>sur <text:span text:style-name="MT1"><text:page-count>16</text:page-count></text:span></text:p>
      </style:footer>
    </style:master-page>
    <style:master-page style:name="Converted3" style:page-layout-name="Mpm5">
      <style:header>
        <text:p text:style-name="MP1"/>
        <text:p text:style-name="MP1">Compte-rendu des travaux SAE13 2024</text:p>
      </style:header>
      <style:footer>
        <text:p text:style-name="MP2">12/12/2024<text:tab/><text:tab/><text:tab/><text:tab/>Page <text:span text:style-name="MT1"><text:page-number text:select-page="current">15</text:page-number></text:span><text:s/>sur <text:span text:style-name="MT1"><text:page-count>16</text:page-count></text:span></text:p>
      </style:footer>
    </style:master-page>
    <style:master-page style:name="Converted4" style:page-layout-name="Mpm6">
      <style:header>
        <text:p text:style-name="MP1"/>
        <text:p text:style-name="MP1">Compte-rendu des travaux SAE13 2024</text:p>
      </style:header>
      <style:footer>
        <text:p text:style-name="MP2">12/12/2024<text:tab/><text:tab/><text:tab/><text:tab/>Page <text:span text:style-name="MT1"><text:page-number text:select-page="current">16</text:page-number></text:span><text:s/>sur <text:span text:style-name="MT1"><text:page-count>16</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SAE 1.03</dc:title>
    <dc:subject>Découvrir un dispositif de transmission</dc:subject>
    <meta:initial-creator>Maëlys</meta:initial-creator>
    <meta:editing-cycles>4</meta:editing-cycles>
    <meta:creation-date>2024-12-16T00:04:00</meta:creation-date>
    <dc:date>2025-01-15T22:12:10.438000000</dc:date>
    <meta:editing-duration>PT3M43S</meta:editing-duration>
    <meta:generator>LibreOffice/7.1.0.3$Windows_X86_64 LibreOffice_project/f6099ecf3d29644b5008cc8f48f42f4a40986e4c</meta:generator>
    <meta:document-statistic meta:table-count="0" meta:image-count="32" meta:object-count="0" meta:page-count="16" meta:paragraph-count="183" meta:word-count="3608" meta:character-count="22974" meta:non-whitespace-character-count="19477"/>
    <meta:user-defined meta:name="AppVersion">16.0000</meta:user-defined>
    <meta:user-defined meta:name="Created" meta:value-type="date">2023-01-02T00:00:00</meta:user-defined>
    <meta:user-defined meta:name="Creator">Microsoft® Word pour Microsoft 365</meta:user-defined>
    <meta:user-defined meta:name="LastSaved" meta:value-type="date">2024-11-28T00:00:00</meta:user-defined>
    <meta:user-defined meta:name="Producer" meta:value-type="string">Microsoft® Word pour Microsoft 365</meta:user-defined>
    <meta:template xlink:type="simple" xlink:actuate="onRequest" xlink:title="Normal.dotm" xlink:href=""/>
  </office:meta>
</office:document-meta>
</file>